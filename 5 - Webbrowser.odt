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7">
      <style:paragraph-properties fo:margin-top="0cm" fo:margin-bottom="0cm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8">
      <style:paragraph-properties fo:margin-top="0cm" fo:margin-bottom="0cm" style:contextual-spacing="false"/>
    </style:style>
    <style:style style:name="P32" style:family="paragraph" style:parent-style-name="Text_20_body" style:list-style-name="L18"/>
    <style:style style:name="P33" style:family="paragraph" style:parent-style-name="Text_20_body" style:list-style-name="L19">
      <style:paragraph-properties fo:margin-top="0cm" fo:margin-bottom="0cm" style:contextual-spacing="false"/>
    </style:style>
    <style:style style:name="P34" style:family="paragraph" style:parent-style-name="Text_20_body" style:list-style-name="L19"/>
    <style:style style:name="P35" style:family="paragraph" style:parent-style-name="Text_20_body" style:list-style-name="L20">
      <style:paragraph-properties fo:margin-top="0cm" fo:margin-bottom="0cm" style:contextual-spacing="false"/>
    </style:style>
    <style:style style:name="P36" style:family="paragraph" style:parent-style-name="Text_20_body" style:list-style-name="L20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efening computerles: Werken met een webbrowser</text:h>
      <text:h text:style-name="Heading_20_2" text:outline-level="2">Doel van de oefening</text:h>
      <text:p text:style-name="Text_20_body">Je leert:</text:p>
      <text:list text:style-name="L1">
        <text:list-item>
          <text:p text:style-name="P1">een webbrowser openen </text:p>
        </text:list-item>
        <text:list-item>
          <text:p text:style-name="P1">een website bezoeken </text:p>
        </text:list-item>
        <text:list-item>
          <text:p text:style-name="P1">een zoekmachine gebruiken </text:p>
        </text:list-item>
        <text:list-item>
          <text:p text:style-name="P1">informatie zoeken </text:p>
        </text:list-item>
        <text:list-item>
          <text:p text:style-name="P1">bladwijzers opslaan </text:p>
        </text:list-item>
        <text:list-item>
          <text:p text:style-name="P1">tabbladen gebruiken </text:p>
        </text:list-item>
        <text:list-item>
          <text:p text:style-name="P1">bestanden downloaden </text:p>
        </text:list-item>
        <text:list-item>
          <text:p text:style-name="P2">veilig internet gebruiken </text:p>
        </text:list-item>
      </text:list>
      <text:p text:style-name="Horizontal_20_Line"/>
      <text:h text:style-name="Heading_20_3" text:outline-level="3">Opdracht 1: Start een webbrowser</text:h>
      <text:list text:style-name="L2">
        <text:list-item>
          <text:p text:style-name="P3">Klik op de <text:span text:style-name="Strong_20_Emphasis">Startknop</text:span>. </text:p>
        </text:list-item>
        <text:list-item>
          <text:p text:style-name="P3">Typ één van deze namen: </text:p>
          <text:list>
            <text:list-item>
              <text:p text:style-name="P3">Google Chrome </text:p>
            </text:list-item>
            <text:list-item>
              <text:p text:style-name="P3">Microsoft Edge </text:p>
            </text:list-item>
            <text:list-item>
              <text:p text:style-name="P3">Firefox </text:p>
            </text:list-item>
          </text:list>
        </text:list-item>
        <text:list-item>
          <text:p text:style-name="P4">Klik op het programma. </text:p>
        </text:list-item>
      </text:list>
      <text:p text:style-name="Text_20_body"><text:span text:style-name="Strong_20_Emphasis">Controle:</text:span> Zie je bovenaan een adresbalk?</text:p>
      <text:p text:style-name="Horizontal_20_Line"/>
      <text:h text:style-name="Heading_20_3" text:outline-level="3">Opdracht 2: Open een website</text:h>
      <text:list text:style-name="L3">
        <text:list-item>
          <text:p text:style-name="P5">Klik in de adresbalk bovenaan. </text:p>
        </text:list-item>
        <text:list-item>
          <text:p text:style-name="P6">Typ: </text:p>
        </text:list-item>
      </text:list>
      <text:section text:style-name="Sect1" text:name="code-block-viewer">
        <text:p text:style-name="P7"><text:span text:style-name="Source_20_Text">www.wikipedia.org</text:span></text:p>
      </text:section>
      <text:list text:style-name="L4">
        <text:list-item>
          <text:p text:style-name="P8">Druk op <text:span text:style-name="Strong_20_Emphasis">Enter</text:span>. </text:p>
        </text:list-item>
      </text:list>
      <text:p text:style-name="Text_20_body"><text:span text:style-name="Strong_20_Emphasis">Vraag:</text:span> Welke website is geopend?</text:p>
      <text:p text:style-name="Horizontal_20_Line"/>
      <text:h text:style-name="Heading_20_3" text:outline-level="3">Opdracht 3: Zoek informatie</text:h>
      <text:list text:style-name="L5">
        <text:list-item>
          <text:p text:style-name="P9">Klik in de adresbalk. </text:p>
        </text:list-item>
        <text:list-item>
          <text:p text:style-name="P10">Typ: </text:p>
        </text:list-item>
      </text:list>
      <text:section text:style-name="Sect1" text:name="Sectie1">
        <text:p text:style-name="P7"><text:bookmark text:name="code-block-viewer"/><text:span text:style-name="Source_20_Text">weer Tilburg</text:span></text:p>
      </text:section>
      <text:list text:style-name="L6">
        <text:list-item>
          <text:p text:style-name="P11"><text:soft-page-break/>Druk op <text:span text:style-name="Strong_20_Emphasis">Enter</text:span>. </text:p>
        </text:list-item>
        <text:list-item>
          <text:p text:style-name="P12">Open één zoekresultaat. </text:p>
        </text:list-item>
      </text:list>
      <text:p text:style-name="Text_20_body"><text:span text:style-name="Strong_20_Emphasis">Vraag:</text:span> Welke temperatuur wordt getoond?</text:p>
      <text:p text:style-name="Horizontal_20_Line"/>
      <text:h text:style-name="Heading_20_3" text:outline-level="3">Opdracht 4: Zoek slimmer</text:h>
      <text:p text:style-name="Text_20_body">Zoek achter elkaar:</text:p>
      <text:list text:style-name="L7">
        <text:list-item>
          <text:p text:style-name="P13">goedkope fiets Tilburg </text:p>
        </text:list-item>
        <text:list-item>
          <text:p text:style-name="P13">recept pasta </text:p>
        </text:list-item>
        <text:list-item>
          <text:p text:style-name="P14">openingstijden supermarkt Tilburg </text:p>
        </text:list-item>
      </text:list>
      <text:p text:style-name="Text_20_body">Vergelijk de resultaten.</text:p>
      <text:p text:style-name="Text_20_body"><text:span text:style-name="Strong_20_Emphasis">Vraag:</text:span> Geven andere woorden andere resultaten?</text:p>
      <text:p text:style-name="Horizontal_20_Line"/>
      <text:h text:style-name="Heading_20_3" text:outline-level="3">Opdracht 5: Website bewaren als bladwijzer</text:h>
      <text:list text:style-name="L8">
        <text:list-item>
          <text:p text:style-name="P15">Open een website die je later wilt terugvinden. </text:p>
        </text:list-item>
        <text:list-item>
          <text:p text:style-name="P15">Zoek het <text:span text:style-name="Strong_20_Emphasis">sterretje</text:span> in de browser. </text:p>
        </text:list-item>
        <text:list-item>
          <text:p text:style-name="P15">Klik op het sterretje. </text:p>
        </text:list-item>
        <text:list-item>
          <text:p text:style-name="P15">Kies <text:span text:style-name="Strong_20_Emphasis">Bladwijzer toevoegen / Favoriet toevoegen</text:span>. </text:p>
        </text:list-item>
        <text:list-item>
          <text:p text:style-name="P16">Klik op <text:span text:style-name="Strong_20_Emphasis">Opslaan</text:span>. </text:p>
        </text:list-item>
      </text:list>
      <text:p text:style-name="Text_20_body"><text:span text:style-name="Strong_20_Emphasis">Controle:</text:span> Kun je de website terugvinden bij bladwijzers of favorieten?</text:p>
      <text:p text:style-name="Horizontal_20_Line"/>
      <text:h text:style-name="Heading_20_3" text:outline-level="3">Opdracht 6: Open meerdere tabbladen</text:h>
      <text:list text:style-name="L9">
        <text:list-item>
          <text:p text:style-name="P17">Druk op: </text:p>
        </text:list-item>
      </text:list>
      <text:section text:style-name="Sect1" text:name="Sectie2">
        <text:p text:style-name="P7"><text:bookmark text:name="code-block-viewer Kopiëren 1"/><text:span text:style-name="Source_20_Text">Ctrl + T</text:span></text:p>
      </text:section>
      <text:list text:style-name="L10">
        <text:list-item>
          <text:p text:style-name="P18">Open een nieuwe website. </text:p>
        </text:list-item>
        <text:list-item>
          <text:p text:style-name="P18">Open nog een tabblad. </text:p>
        </text:list-item>
        <text:list-item>
          <text:p text:style-name="P19">Wissel tussen tabbladen. </text:p>
        </text:list-item>
      </text:list>
      <text:p text:style-name="Text_20_body"><text:span text:style-name="Strong_20_Emphasis">Vraag:</text:span> Hoeveel tabbladen staan open?</text:p>
      <text:p text:style-name="Horizontal_20_Line"/>
      <text:h text:style-name="Heading_20_3" text:outline-level="3">Opdracht 7: Sluit tabbladen</text:h>
      <text:list text:style-name="L11">
        <text:list-item>
          <text:p text:style-name="P20">Klik op het <text:span text:style-name="Strong_20_Emphasis">X-symbool</text:span> van een tabblad. </text:p>
        </text:list-item>
        <text:list-item>
          <text:p text:style-name="P21">Sluit alle tabbladen behalve één. </text:p>
        </text:list-item>
      </text:list>
      <text:p text:style-name="Text_20_body"><text:span text:style-name="Strong_20_Emphasis">Controle:</text:span> Staat nog maar één tabblad open?</text:p>
      <text:p text:style-name="Horizontal_20_Line"/>
      <text:h text:style-name="Heading_20_3" text:outline-level="3"><text:soft-page-break/>Opdracht 8: Download een afbeelding</text:h>
      <text:list text:style-name="L12">
        <text:list-item>
          <text:p text:style-name="P22">Zoek via een zoekmachine naar: </text:p>
        </text:list-item>
      </text:list>
      <text:section text:style-name="Sect1" text:name="Sectie3">
        <text:p text:style-name="P7"><text:bookmark text:name="code-block-viewer Kopiëren 2"/><text:span text:style-name="Source_20_Text">Nederland vlag</text:span></text:p>
      </text:section>
      <text:list text:style-name="L13">
        <text:list-item>
          <text:p text:style-name="P23">Open een afbeelding. </text:p>
        </text:list-item>
        <text:list-item>
          <text:p text:style-name="P23">Klik met de rechtermuisknop. </text:p>
        </text:list-item>
        <text:list-item>
          <text:p text:style-name="P24">Kies: </text:p>
        </text:list-item>
      </text:list>
      <text:p text:style-name="Text_20_body"><text:span text:style-name="Strong_20_Emphasis">Afbeelding opslaan als</text:span></text:p>
      <text:list text:style-name="L14">
        <text:list-item>
          <text:p text:style-name="P25">Sla op in <text:span text:style-name="Strong_20_Emphasis">Downloads</text:span>. </text:p>
        </text:list-item>
      </text:list>
      <text:p text:style-name="Text_20_body"><text:span text:style-name="Strong_20_Emphasis">Vraag:</text:span> Kun je het bestand terugvinden?</text:p>
      <text:p text:style-name="Horizontal_20_Line"/>
      <text:h text:style-name="Heading_20_3" text:outline-level="3">Opdracht 9: Bekijk bezochte websites</text:h>
      <text:list text:style-name="L15">
        <text:list-item>
          <text:p text:style-name="P26">Druk op: </text:p>
        </text:list-item>
      </text:list>
      <text:section text:style-name="Sect1" text:name="Sectie4">
        <text:p text:style-name="P7"><text:bookmark text:name="code-block-viewer Kopiëren 3"/><text:span text:style-name="Source_20_Text">Ctrl + H</text:span></text:p>
      </text:section>
      <text:list text:style-name="L16">
        <text:list-item>
          <text:p text:style-name="P27">Bekijk de lijst met bezochte websites. </text:p>
        </text:list-item>
        <text:list-item>
          <text:p text:style-name="P28">Zoek een website die je eerder geopend hebt. </text:p>
        </text:list-item>
      </text:list>
      <text:p text:style-name="Text_20_body"><text:span text:style-name="Strong_20_Emphasis">Doel:</text:span> Leren eerder bezochte websites terugvinden.</text:p>
      <text:p text:style-name="Horizontal_20_Line"/>
      <text:h text:style-name="Heading_20_3" text:outline-level="3">Opdracht 10: Controleer websites</text:h>
      <text:p text:style-name="Text_20_body">Open drie websites.</text:p>
      <text:p text:style-name="Text_20_body">Controleer:</text:p>
      <text:list text:style-name="L17">
        <text:list-item>
          <text:p text:style-name="P29">Staat er een slotje naast het adres? </text:p>
        </text:list-item>
        <text:list-item>
          <text:p text:style-name="P29">Begint het adres met <text:span text:style-name="Source_20_Text">https</text:span>? </text:p>
        </text:list-item>
        <text:list-item>
          <text:p text:style-name="P30">Is het adres logisch geschreven? </text:p>
        </text:list-item>
      </text:list>
      <text:p text:style-name="Text_20_body"><text:span text:style-name="Strong_20_Emphasis">Vraag:</text:span> Welke website lijkt het meest betrouwbaar?</text:p>
      <text:p text:style-name="Horizontal_20_Line"/>
      <text:h text:style-name="Heading_20_3" text:outline-level="3">Opdracht 11: Navigeren tussen pagina's</text:h>
      <text:list text:style-name="L18">
        <text:list-item>
          <text:p text:style-name="P31">Open meerdere websites. </text:p>
        </text:list-item>
        <text:list-item>
          <text:p text:style-name="P31">Klik op de <text:span text:style-name="Strong_20_Emphasis">terug-knop</text:span>. </text:p>
        </text:list-item>
        <text:list-item>
          <text:p text:style-name="P32">Klik daarna op <text:span text:style-name="Strong_20_Emphasis">vooruit</text:span>. </text:p>
        </text:list-item>
      </text:list>
      <text:p text:style-name="Text_20_body"><text:span text:style-name="Strong_20_Emphasis">Vraag:</text:span> Wat gebeurt er?</text:p>
      <text:p text:style-name="Horizontal_20_Line"/>
      <text:h text:style-name="Heading_20_3" text:outline-level="3">Opdracht 12: Browser sluiten</text:h>
      <text:list text:style-name="L19">
        <text:list-item>
          <text:p text:style-name="P33">Sluit alle tabbladen. </text:p>
        </text:list-item>
        <text:list-item>
          <text:p text:style-name="P33"><text:soft-page-break/>Klik rechtsboven op <text:span text:style-name="Strong_20_Emphasis">X</text:span>. </text:p>
        </text:list-item>
        <text:list-item>
          <text:p text:style-name="P34">Controleer of de browser volledig gesloten is. </text:p>
        </text:list-item>
      </text:list>
      <text:p text:style-name="Horizontal_20_Line"/>
      <text:h text:style-name="Heading_20_1" text:outline-level="1">Extra uitdaging</text:h>
      <text:p text:style-name="Text_20_body">Zoek informatie over:</text:p>
      <text:list text:style-name="L20">
        <text:list-item>
          <text:p text:style-name="P35">openingstijden van een supermarkt </text:p>
        </text:list-item>
        <text:list-item>
          <text:p text:style-name="P35">een treinreis </text:p>
        </text:list-item>
        <text:list-item>
          <text:p text:style-name="P35">het weer morgen </text:p>
        </text:list-item>
        <text:list-item>
          <text:p text:style-name="P36">een recept </text:p>
        </text:list-item>
      </text:list>
      <text:p text:style-name="Text_20_body">Sla daarna twee nuttige websites op als bladwijzer.</text:p>
      <text:p text:style-name="Text_20_body">Ik heb ook geschiedenis, downloads, tabbladen en veiligheid toegevoegd omdat mensen die vaardigheden vaak nodig hebben in dagelijks gebruik, niet alleen websites open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1:14:52.941164586</meta:creation-date>
    <dc:date>2026-06-01T12:35:23.989369200</dc:date>
    <meta:editing-duration>PT1M55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4" meta:paragraph-count="96" meta:word-count="455" meta:character-count="2752" meta:non-whitespace-character-count="2393"/>
  </office:meta>
</office:document-meta>
</file>