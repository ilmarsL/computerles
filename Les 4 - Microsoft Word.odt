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66700000431B31BE5A7.png" manifest:media-type="image/png"/>
  <manifest:file-entry manifest:full-path="Pictures/1000000100000264000003901A331BF9.png" manifest:media-type="image/png"/>
  <manifest:file-entry manifest:full-path="Pictures/10000001000004C800000151B073E06E.png" manifest:media-type="image/png"/>
  <manifest:file-entry manifest:full-path="Pictures/10000001000003EE00000340E896851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el1" style:family="table">
      <style:table-properties style:width="6.715cm" fo:margin-left="0cm" table:align="left"/>
    </style:style>
    <style:style style:name="Tabel1.A" style:family="table-column">
      <style:table-column-properties style:column-width="2.346cm"/>
    </style:style>
    <style:style style:name="Tabel1.B" style:family="table-column">
      <style:table-column-properties style:column-width="1.411cm"/>
    </style:style>
    <style:style style:name="Tabel1.C" style:family="table-column">
      <style:table-column-properties style:column-width="2.958cm"/>
    </style:style>
    <style:style style:name="Tabel1.A1" style:family="table-cell">
      <style:table-cell-properties style:vertical-align="middle" fo:padding="0.049cm" fo:border="none" style:writing-mode="lr-tb"/>
    </style:style>
    <style:style style:name="P1" style:family="paragraph" style:parent-style-name="Kop_20_1" style:master-page-name="MP0">
      <style:paragraph-properties style:page-number="auto" fo:break-before="page"/>
      <style:text-properties fo:language="nl" fo:country="NL"/>
    </style:style>
    <style:style style:name="P2" style:family="paragraph" style:parent-style-name="Kop_20_2">
      <style:text-properties fo:language="nl" fo:country="NL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cm" fo:margin-bottom="0cm" style:contextual-spacing="false"/>
      <style:text-properties fo:language="nl" fo:country="NL"/>
    </style:style>
    <style:style style:name="P6" style:family="paragraph" style:parent-style-name="Text_20_body" style:list-style-name="L2">
      <style:text-properties fo:language="nl" fo:country="NL"/>
    </style:style>
    <style:style style:name="P7" style:family="paragraph" style:parent-style-name="Horizontal_20_Line">
      <style:text-properties fo:language="nl" fo:country="NL"/>
    </style:style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3">
      <style:text-properties fo:language="nl" fo:country="NL"/>
    </style:style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Preformatted_20_Text">
      <style:paragraph-properties fo:margin-top="0cm" fo:margin-bottom="0.499cm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>
      <style:paragraph-properties fo:margin-top="0cm" fo:margin-bottom="0cm" style:contextual-spacing="false"/>
    </style:style>
    <style:style style:name="P21" style:family="paragraph" style:parent-style-name="Text_20_body" style:list-style-name="L9">
      <style:text-properties fo:language="nl" fo:country="NL"/>
    </style:style>
    <style:style style:name="P22" style:family="paragraph" style:parent-style-name="Text_20_body" style:list-style-name="L10"/>
    <style:style style:name="P23" style:family="paragraph" style:parent-style-name="Text_20_body" style:list-style-name="">
      <style:paragraph-properties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24" style:family="paragraph" style:parent-style-name="Text_20_body">
      <style:text-properties fo:language="nl" fo:country="NL"/>
    </style:style>
    <style:style style:name="P25" style:family="paragraph" style:parent-style-name="Text_20_body" style:list-style-name="L11">
      <style:paragraph-properties fo:margin-top="0cm" fo:margin-bottom="0cm" style:contextual-spacing="false"/>
    </style:style>
    <style:style style:name="P26" style:family="paragraph" style:parent-style-name="Text_20_body" style:list-style-name="L11"/>
    <style:style style:name="P27" style:family="paragraph" style:parent-style-name="Standard">
      <style:text-properties fo:language="nl" fo:country="NL"/>
    </style:style>
    <style:style style:name="T1" style:family="text">
      <style:text-properties fo:language="nl" fo:country="N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7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7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7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7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7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7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9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9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9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9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9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9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el 1 – Microsoft Word starten</text:h>
      <text:h text:style-name="P2" text:outline-level="2">Methode 1 – Via het Startmenu</text:h>
      <text:list text:style-name="L1">
        <text:list-item>
          <text:p text:style-name="P3"><text:span text:style-name="Standaardalinea-lettertype"><text:span text:style-name="T1">Klik op de </text:span></text:span><text:span text:style-name="Strong_20_Emphasis"><text:span text:style-name="T1">Startknop</text:span></text:span><text:span text:style-name="Standaardalinea-lettertype"><text:span text:style-name="T1"> onderaan het scherm.</text:span></text:span></text:p>
        </text:list-item>
        <text:list-item>
          <text:p text:style-name="P4">Typ:</text:p>
        </text:list-item>
      </text:list>
      <text:p text:style-name="Text_20_body"><text:span text:style-name="Source_20_Text">Word</text:span></text:p>
      <text:list text:continue-numbering="true" text:style-name="L1">
        <text:list-item>
          <text:p text:style-name="P4"><text:span text:style-name="Standaardalinea-lettertype"><text:span text:style-name="T1">Klik op </text:span></text:span><text:span text:style-name="Strong_20_Emphasis"><text:span text:style-name="T1">Microsoft Word (Word App)</text:span></text:span><text:span text:style-name="Standaardalinea-lettertype"><text:span text:style-name="T1">.</text:span></text:span></text:p>
        </text:list-item>
      </text:list>
      <text:p text:style-name="Text_20_body">Microsoft Word</text:p>
      <text:p text:style-name="Text_20_body"><draw:frame draw:style-name="fr1" draw:name="Afbeelding1" text:anchor-type="char" svg:width="17cm" svg:height="11.128cm" draw:z-index="0"><draw:image xlink:href="Pictures/100000010000066700000431B31BE5A7.png" xlink:type="simple" xlink:show="embed" xlink:actuate="onLoad" draw:mime-type="image/png"/></draw:frame></text:p>
      <text:p text:style-name="Horizontal_20_Line"/>
      <text:h text:style-name="P2" text:outline-level="2">Methode 2 – Via een snelkoppeling op het bureaublad</text:h>
      <text:list text:style-name="L2">
        <text:list-item>
          <text:p text:style-name="P5">Zoek het Word-pictogram op het bureaublad.</text:p>
        </text:list-item>
        <text:list-item>
          <text:p text:style-name="P6">Dubbelklik met de linker muisknop.</text:p>
        </text:list-item>
      </text:list>
      <text:p text:style-name="P7"/>
      <text:h text:style-name="Kop_20_1" text:outline-level="1">Deel 2 – Een nieuw document maken</text:h>
      <text:list text:style-name="L3">
        <text:list-item>
          <text:p text:style-name="P8">Klik op <text:span text:style-name="Strong_20_Emphasis">Leeg document</text:span>.</text:p>
        </text:list-item>
        <text:list-item>
          <text:p text:style-name="P9">Wacht tot het witte document verschijnt.</text:p>
        </text:list-item>
      </text:list>
      <text:p text:style-name="P7"/>
      <text:h text:style-name="Kop_20_1" text:outline-level="1"><text:soft-page-break/>Deel 3 – Een titel typen</text:h>
      <text:list text:style-name="L4">
        <text:list-item>
          <text:p text:style-name="P10">Klik bovenaan de pagina.</text:p>
        </text:list-item>
        <text:list-item>
          <text:p text:style-name="P11">Typ:</text:p>
        </text:list-item>
      </text:list>
      <text:section text:style-name="Sect1" text:name="Sect1">
        <text:p text:style-name="P12"><text:span text:style-name="Source_20_Text">Bestelling Café De Markt</text:span></text:p>
      </text:section>
      <text:section text:style-name="Sect1" text:name="Sect2">
        <text:list text:style-name="L5">
          <text:list-item>
            <text:p text:style-name="P13">Druk daarna op <text:span text:style-name="Strong_20_Emphasis">Enter</text:span>.</text:p>
          </text:list-item>
        </text:list>
        <text:p text:style-name="Horizontal_20_Line"/>
        <text:h text:style-name="Kop_20_1" text:outline-level="1">Deel 4 – Een tabel invoegen</text:h>
        <text:list text:style-name="L6">
          <text:list-item>
            <text:p text:style-name="P14">Klik bovenaan op <text:span text:style-name="Strong_20_Emphasis">Invoegen</text:span>.</text:p>
          </text:list-item>
          <text:list-item>
            <text:p text:style-name="P14">Klik op <text:span text:style-name="Strong_20_Emphasis">Tabel</text:span>.</text:p>
          </text:list-item>
          <text:list-item>
            <text:p text:style-name="P15">Kies een tabel van:</text:p>
          </text:list-item>
        </text:list>
        <text:list text:style-name="L7">
          <text:list-item>
            <text:p text:style-name="P16">3 kolommen</text:p>
          </text:list-item>
          <text:list-item>
            <text:p text:style-name="P17">6 rijen</text:p>
          </text:list-item>
        </text:list>
        <text:p text:style-name="Text_20_body"><draw:frame draw:style-name="fr2" draw:name="Afbeelding2" text:anchor-type="char" svg:width="7.777cm" svg:height="11.589cm" draw:z-index="1"><draw:image xlink:href="Pictures/1000000100000264000003901A331BF9.png" xlink:type="simple" xlink:show="embed" xlink:actuate="onLoad" draw:mime-type="image/png"/></draw:frame></text:p>
        <text:h text:style-name="Kop_20_3" text:outline-level="3">De kolommen worden:</text:h>
        <text:p text:style-name="Text_20_body">| Product | Aantal | Leverancier |</text:p>
        <text:p text:style-name="Horizontal_20_Line"/>
        <text:h text:style-name="Kop_20_1" text:outline-level="1"><text:soft-page-break/>Deel 5 – De tabel invullen</text:h>
        <text:p text:style-name="Text_20_body">Typ bijvoorbeeld:</text:p>
        <table:table table:name="Tabel1" table:style-name="Tabel1">
          <table:table-column table:style-name="Tabel1.A"/>
          <table:table-column table:style-name="Tabel1.B"/>
          <table:table-column table:style-name="Tabel1.C"/>
          <table:table-header-rows>
            <table:table-row>
              <table:table-cell table:style-name="Tabel1.A1" office:value-type="string">
                <text:p text:style-name="Table_20_Heading">Product</text:p>
              </table:table-cell>
              <table:table-cell table:style-name="Tabel1.A1" office:value-type="string">
                <text:p text:style-name="Table_20_Heading">Aantal</text:p>
              </table:table-cell>
              <table:table-cell table:style-name="Tabel1.A1" office:value-type="string">
                <text:p text:style-name="Table_20_Heading">Leverancier</text:p>
              </table:table-cell>
            </table:table-row>
          </table:table-header-rows>
          <table:table-row>
            <table:table-cell table:style-name="Tabel1.A1" office:value-type="string">
              <text:p text:style-name="Table_20_Contents">Koffiebonen</text:p>
            </table:table-cell>
            <table:table-cell table:style-name="Tabel1.A1" office:value-type="string">
              <text:p text:style-name="Table_20_Contents">5</text:p>
            </table:table-cell>
            <table:table-cell table:style-name="Tabel1.A1" office:value-type="string">
              <text:p text:style-name="Table_20_Contents">Jacobs</text:p>
            </table:table-cell>
          </table:table-row>
          <table:table-row>
            <table:table-cell table:style-name="Tabel1.A1" office:value-type="string">
              <text:p text:style-name="Table_20_Contents">Melk</text:p>
            </table:table-cell>
            <table:table-cell table:style-name="Tabel1.A1" office:value-type="string">
              <text:p text:style-name="Table_20_Contents">12</text:p>
            </table:table-cell>
            <table:table-cell table:style-name="Tabel1.A1" office:value-type="string">
              <text:p text:style-name="Table_20_Contents">Campina</text:p>
            </table:table-cell>
          </table:table-row>
          <table:table-row>
            <table:table-cell table:style-name="Tabel1.A1" office:value-type="string">
              <text:p text:style-name="Table_20_Contents">Croissants</text:p>
            </table:table-cell>
            <table:table-cell table:style-name="Tabel1.A1" office:value-type="string">
              <text:p text:style-name="Table_20_Contents">30</text:p>
            </table:table-cell>
            <table:table-cell table:style-name="Tabel1.A1" office:value-type="string">
              <text:p text:style-name="Table_20_Contents">Bakkerij Jansen</text:p>
            </table:table-cell>
          </table:table-row>
          <table:table-row>
            <table:table-cell table:style-name="Tabel1.A1" office:value-type="string">
              <text:p text:style-name="Table_20_Contents">Kaas</text:p>
            </table:table-cell>
            <table:table-cell table:style-name="Tabel1.A1" office:value-type="string">
              <text:p text:style-name="Table_20_Contents">4</text:p>
            </table:table-cell>
            <table:table-cell table:style-name="Tabel1.A1" office:value-type="string">
              <text:p text:style-name="Table_20_Contents">Sligro</text:p>
            </table:table-cell>
          </table:table-row>
          <table:table-row>
            <table:table-cell table:style-name="Tabel1.A1" office:value-type="string">
              <text:p text:style-name="Table_20_Contents">Thee</text:p>
            </table:table-cell>
            <table:table-cell table:style-name="Tabel1.A1" office:value-type="string">
              <text:p text:style-name="Table_20_Contents">8</text:p>
            </table:table-cell>
            <table:table-cell table:style-name="Tabel1.A1" office:value-type="string">
              <text:p text:style-name="Table_20_Contents">Pickwick</text:p>
            </table:table-cell>
          </table:table-row>
        </table:table>
        <text:p text:style-name="Horizontal_20_Line"/>
        <text:h text:style-name="Kop_20_1" text:outline-level="1">Deel 6 – Tekst vet maken</text:h>
        <text:list text:style-name="L8">
          <text:list-item>
            <text:p text:style-name="P18">Selecteer de titel:</text:p>
          </text:list-item>
        </text:list>
        <text:p text:style-name="Text_20_body"><text:span text:style-name="Source_20_Text">Bestelling Café De Markt</text:span></text:p>
        <text:list text:continue-numbering="true" text:style-name="L8">
          <text:list-item>
            <text:p text:style-name="P18"><text:span text:style-name="Standaardalinea-lettertype"><text:span text:style-name="T1">Klik bovenaan op de knop </text:span></text:span><text:span text:style-name="Strong_20_Emphasis"><text:span text:style-name="T1">B</text:span></text:span><text:span text:style-name="Standaardalinea-lettertype"><text:span text:style-name="T1"> (Vet).</text:span></text:span></text:p>
          </text:list-item>
        </text:list>
        <text:p text:style-name="P7"/>
        <text:h text:style-name="Kop_20_1" text:outline-level="1">Deel 7 – Het document opslaan</text:h>
        <text:list text:style-name="L9">
          <text:list-item>
            <text:p text:style-name="P19">Klik linksboven op <text:span text:style-name="Strong_20_Emphasis">Bestand</text:span>.</text:p>
          </text:list-item>
        </text:list>
        <text:p text:style-name="P20"><draw:frame draw:style-name="fr1" draw:name="Afbeelding3" text:anchor-type="char" svg:width="17cm" svg:height="4.68cm" draw:z-index="2"><draw:image xlink:href="Pictures/10000001000004C800000151B073E06E.png" xlink:type="simple" xlink:show="embed" xlink:actuate="onLoad" draw:mime-type="image/png"/></draw:frame></text:p>
        <text:list text:continue-numbering="true" text:style-name="L9">
          <text:list-item>
            <text:p text:style-name="P19">Klik op <text:span text:style-name="Strong_20_Emphasis">Opslaan als</text:span>.</text:p>
          </text:list-item>
          <text:list-item>
            <text:p text:style-name="P19">Kies bijvoorbeeld:</text:p>
            <text:list>
              <text:list-item>
                <text:p text:style-name="P19">Documenten</text:p>
              </text:list-item>
              <text:list-item>
                <text:p text:style-name="P19">Bureaublad</text:p>
              </text:list-item>
            </text:list>
          </text:list-item>
          <text:list-item>
            <text:p text:style-name="P21">Geef het document deze naam:</text:p>
          </text:list-item>
        </text:list>
      </text:section>
      <text:section text:style-name="Sect1" text:name="Sect3">
        <text:p text:style-name="P12"><text:bookmark text:name="code-block-viewer"/><text:span text:style-name="Source_20_Text">Bestelling_cafe</text:span></text:p>
      </text:section>
      <text:section text:style-name="Sect1" text:name="Sect4">
        <text:list text:style-name="L10">
          <text:list-item>
            <text:p text:style-name="P22">Klik op <text:span text:style-name="Strong_20_Emphasis">Opslaan</text:span>.</text:p>
          </text:list-item>
        </text:list>
        <text:p text:style-name="P23"><draw:frame draw:style-name="fr3" draw:name="Afbeelding4" text:anchor-type="char" svg:width="13.714cm" svg:height="11.34cm" draw:z-index="3"><draw:image xlink:href="Pictures/10000001000003EE00000340E8968519.png" xlink:type="simple" xlink:show="embed" xlink:actuate="onLoad" draw:mime-type="image/png"/></draw:frame><text:soft-page-break/></text:p>
        <text:p text:style-name="Horizontal_20_Line"/>
        <text:h text:style-name="Kop_20_1" text:outline-level="1">Extra oefening</text:h>
        <text:h text:style-name="Kop_20_2" text:outline-level="2">Moeilijker maken</text:h>
        <text:p text:style-name="P24">Voeg extra producten toe aan de tabel, bijvoorbeeld:</text:p>
        <text:list text:style-name="L11">
          <text:list-item>
            <text:p text:style-name="P25">suiker</text:p>
          </text:list-item>
          <text:list-item>
            <text:p text:style-name="P25">servetten</text:p>
          </text:list-item>
          <text:list-item>
            <text:p text:style-name="P26">sinaasappelsap</text:p>
          </text:list-item>
        </text:list>
        <text:p text:style-name="Horizontal_20_Line"/>
        <text:h text:style-name="Kop_20_1" text:outline-level="1">Bonusopdracht</text:h>
        <text:p text:style-name="P24">Maak onder de tabel deze zin:</text:p>
      </text:section>
      <text:section text:style-name="Sect1" text:name="Sect5">
        <text:p text:style-name="P12"><text:bookmark text:name="code-block-viewer_Kopiëren_1"/><text:span text:style-name="Source_20_Text"><text:span text:style-name="T1">Bestelling gecontroleerd door:</text:span></text:span></text:p>
      </text:section>
      <text:section text:style-name="Sect1" text:name="Sect6">
        <text:p text:style-name="P24">Druk daarna een paar keer op Enter zodat iemand later een handtekening kan zetten.</text:p>
        <text:p text:style-name="P27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Kop_20_1" style:display-name="Kop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Kop_20_2" style:display-name="Kop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Kop_20_3" style:display-name="Kop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Noto Serif CJK SC" style:font-family-asian="'Noto Serif CJK SC'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tandaard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jst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Bijschrift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fo:hyphenation-keep="auto" loext:hyphenation-keep-type="column" loext:hyphenation-keep-line="false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tandaardalinea-lettertype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2" style:display-name="WW_CharLFO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5" style:display-name="WW_CharLFO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8" style:display-name="WW_CharLFO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2" style:display-name="WW_CharLFO1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5" style:display-name="WW_CharLFO1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8" style:display-name="WW_CharLFO1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meta:creation-date>2026-05-16T13:48:00Z</meta:creation-date>
    <dc:date>2026-05-18T17:01:40.118877700</dc:date>
    <meta:editing-cycles>4</meta:editing-cycles>
    <meta:editing-duration>PT19M13S</meta:editing-duration>
    <meta:document-statistic meta:table-count="1" meta:image-count="4" meta:object-count="0" meta:page-count="4" meta:paragraph-count="69" meta:word-count="247" meta:character-count="1366" meta:non-whitespace-character-count="1206"/>
    <meta:template xlink:type="simple" xlink:actuate="onRequest" xlink:title="" xlink:href="Normal.dotm"/>
  </office:meta>
</office:document-meta>
</file>