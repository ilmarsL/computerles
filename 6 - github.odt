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3B000002F7804FECAA.png" manifest:media-type="image/png"/>
  <manifest:file-entry manifest:full-path="Pictures/1000000100000466000001517E2FB3EA.png" manifest:media-type="image/png"/>
  <manifest:file-entry manifest:full-path="Pictures/10000001000005720000042CE64AFF96.png" manifest:media-type="image/png"/>
  <manifest:file-entry manifest:full-path="Pictures/100000010000031C000001F9A8188BAB.png" manifest:media-type="image/png"/>
  <manifest:file-entry manifest:full-path="Pictures/1000000100000751000002F5B2E4B796.png" manifest:media-type="image/png"/>
  <manifest:file-entry manifest:full-path="Pictures/1000000100000721000003A99DEF0776.png" manifest:media-type="image/png"/>
  <manifest:file-entry manifest:full-path="Pictures/100000010000028800000175F80ADA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0204"/>
    </style:style>
    <style:style style:name="P2" style:family="paragraph" style:parent-style-name="Text_20_body">
      <style:text-properties officeooo:paragraph-rsid="000f0204"/>
    </style:style>
    <style:style style:name="P3" style:family="paragraph" style:parent-style-name="Text_20_body">
      <style:text-properties officeooo:rsid="00108c39" officeooo:paragraph-rsid="00108c39"/>
    </style:style>
    <style:style style:name="P4" style:family="paragraph" style:parent-style-name="Heading_20_2">
      <style:text-properties officeooo:rsid="0010e7d4" officeooo:paragraph-rsid="0010e7d4"/>
    </style:style>
    <style:style style:name="P5" style:family="paragraph" style:parent-style-name="Text_20_body">
      <style:text-properties officeooo:rsid="0012c94e" officeooo:paragraph-rsid="0012c94e"/>
    </style:style>
    <style:style style:name="P6" style:family="paragraph" style:parent-style-name="Text_20_body">
      <style:text-properties officeooo:rsid="0012c94e" officeooo:paragraph-rsid="002125c6"/>
    </style:style>
    <style:style style:name="P7" style:family="paragraph" style:parent-style-name="Heading_20_2">
      <style:text-properties officeooo:rsid="00139890" officeooo:paragraph-rsid="00139890"/>
    </style:style>
    <style:style style:name="P8" style:family="paragraph" style:parent-style-name="Text_20_body">
      <style:text-properties officeooo:rsid="00153316" officeooo:paragraph-rsid="00153316"/>
    </style:style>
    <style:style style:name="P9" style:family="paragraph" style:parent-style-name="Heading_20_2">
      <style:text-properties officeooo:rsid="001654a5" officeooo:paragraph-rsid="001654a5"/>
    </style:style>
    <style:style style:name="P10" style:family="paragraph" style:parent-style-name="Text_20_body">
      <style:text-properties officeooo:rsid="001654a5" officeooo:paragraph-rsid="0025c966"/>
    </style:style>
    <style:style style:name="P11" style:family="paragraph" style:parent-style-name="Text_20_body">
      <style:text-properties officeooo:rsid="001654a5" officeooo:paragraph-rsid="001654a5"/>
    </style:style>
    <style:style style:name="P12" style:family="paragraph" style:parent-style-name="Text_20_body">
      <style:paragraph-properties fo:break-before="page"/>
      <style:text-properties officeooo:rsid="0016664f" officeooo:paragraph-rsid="0017bf8f"/>
    </style:style>
    <style:style style:name="P13" style:family="paragraph" style:parent-style-name="Text_20_body">
      <style:text-properties officeooo:rsid="0016664f" officeooo:paragraph-rsid="0016664f"/>
    </style:style>
    <style:style style:name="P14" style:family="paragraph" style:parent-style-name="Text_20_body">
      <style:text-properties officeooo:rsid="0017bf8f" officeooo:paragraph-rsid="0019aa9a"/>
    </style:style>
    <style:style style:name="P15" style:family="paragraph" style:parent-style-name="Text_20_body">
      <style:text-properties officeooo:rsid="0019aa9a" officeooo:paragraph-rsid="0019aa9a"/>
    </style:style>
    <style:style style:name="P16" style:family="paragraph" style:parent-style-name="Text_20_body">
      <style:paragraph-properties fo:break-before="page"/>
      <style:text-properties officeooo:rsid="001af30e" officeooo:paragraph-rsid="001af30e"/>
    </style:style>
    <style:style style:name="P17" style:family="paragraph" style:parent-style-name="Text_20_body">
      <style:text-properties officeooo:rsid="001af30e" officeooo:paragraph-rsid="001af30e"/>
    </style:style>
    <style:style style:name="T1" style:family="text">
      <style:text-properties officeooo:rsid="000f0204"/>
    </style:style>
    <style:style style:name="T2" style:family="text">
      <style:text-properties officeooo:rsid="0020f069"/>
    </style:style>
    <style:style style:name="T3" style:family="text">
      <style:text-properties officeooo:rsid="0020a46f"/>
    </style:style>
    <style:style style:name="T4" style:family="text">
      <style:text-properties officeooo:rsid="002125c6"/>
    </style:style>
    <style:style style:name="T5" style:family="text">
      <style:text-properties officeooo:rsid="001cd71f"/>
    </style:style>
    <style:style style:name="T6" style:family="text">
      <style:text-properties officeooo:rsid="00216104"/>
    </style:style>
    <style:style style:name="T7" style:family="text">
      <style:text-properties officeooo:rsid="0023c02b"/>
    </style:style>
    <style:style style:name="T8" style:family="text">
      <style:text-properties officeooo:rsid="0024a1c1"/>
    </style:style>
    <style:style style:name="T9" style:family="text">
      <style:text-properties officeooo:rsid="0025c966"/>
    </style:style>
    <style:style style:name="T10" style:family="text">
      <style:text-properties officeooo:rsid="00275d3a"/>
    </style:style>
    <style:style style:name="T11" style:family="text">
      <style:text-properties officeooo:rsid="0017bf8f"/>
    </style:style>
    <style:style style:name="T12" style:family="text">
      <style:text-properties officeooo:rsid="0027f11b"/>
    </style:style>
    <style:style style:name="T13" style:family="text">
      <style:text-properties officeooo:rsid="00289ac9"/>
    </style:style>
    <style:style style:name="T14" style:family="text">
      <style:text-properties officeooo:rsid="0028d1d5"/>
    </style:style>
    <style:style style:name="T15" style:family="text">
      <style:text-properties officeooo:rsid="002907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efening <text:span text:style-name="T1">6 – </text:span><text:span text:style-name="T2">Bestanden downloaden</text:span><text:span text:style-name="T1"> van Github</text:span></text:h>
      <text:p text:style-name="P2"/>
      <text:p text:style-name="P3">In deze oefening leer je hoe <text:span text:style-name="T3">je</text:span> oefeningen <text:span text:style-name="T3">van</text:span> <text:span text:style-name="T3">G</text:span>ithub <text:span text:style-name="T3">kunt</text:span> downloaden.</text:p>
      <text:h text:style-name="P4" text:outline-level="2">Opdracht 1: Webbrowser (Microsoft Edge) openen</text:h>
      <text:p text:style-name="P5">1. Klik <text:span text:style-name="T4">éé</text:span>n keer <text:span text:style-name="T4">met de linkermuisknop</text:span> op <text:span text:style-name="T2">het pictogram van</text:span> Microsoft Edge in de taakbalk.</text:p>
      <text:p text:style-name="P5"><draw:frame draw:style-name="fr1" draw:name="Afbeelding1" text:anchor-type="char" svg:width="17cm" svg:height="5.29cm" draw:z-index="0"><draw:image xlink:href="Pictures/1000000100000466000001517E2FB3EA.png" xlink:type="simple" xlink:show="embed" xlink:actuate="onLoad" draw:mime-type="image/png"/></draw:frame></text:p>
      <text:p text:style-name="P5">Of</text:p>
      <text:p text:style-name="P6">1. Klik <text:span text:style-name="T5">éé</text:span>n keer op <text:span text:style-name="T6">de </text:span>knop <text:span text:style-name="T6">Start.</text:span></text:p>
      <text:p text:style-name="P6">2. <text:s/>Klik <text:span text:style-name="T5">éé</text:span>n keer op <text:span text:style-name="T4">het pictogram van Microsoft Edge (Webbrowser)</text:span></text:p>
      <text:p text:style-name="P3"><draw:frame draw:style-name="fr2" draw:name="Afbeelding2" text:anchor-type="char" svg:width="13.854cm" svg:height="10.613cm" draw:z-index="1"><draw:image xlink:href="Pictures/10000001000005720000042CE64AFF96.png" xlink:type="simple" xlink:show="embed" xlink:actuate="onLoad" draw:mime-type="image/png"/></draw:frame></text:p>
      <text:h text:style-name="P7" text:outline-level="2"><text:soft-page-break/>Opdracht 2: Open Github webpagina</text:h>
      <text:p text:style-name="P8">1. <text:span text:style-name="T7">Typ i</text:span>n de adresbalk van <text:span text:style-name="T7">de</text:span> <text:span text:style-name="T8">w</text:span>ebbrowser <text:span text:style-name="T8">(Microsoft Edge)</text:span> <text:span text:style-name="T7">het </text:span>adres van onze computerles: ‘github.com/ilmarsl/computerles’ en druk <text:span text:style-name="T7">op </text:span>‘Enter’ <text:span text:style-name="T7">op het</text:span> toetsenbord.</text:p>
      <text:p text:style-name="P8"><draw:frame draw:style-name="fr3" draw:name="Afbeelding3" text:anchor-type="char" svg:x="2.649cm" svg:y="-0.035cm" svg:width="11.702cm" svg:height="7.424cm" draw:z-index="2"><draw:image xlink:href="Pictures/100000010000031C000001F9A8188BA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" text:outline-level="2">Opdracht 3: Open de oefening.</text:h>
      <text:p text:style-name="P10">1. Zoek de oefening die je nodig hebt in de lijst (bijvoorbeeld 'Les 3 – Zoekmachines').</text:p>
      <text:p text:style-name="P10"><text:span text:style-name="T9">2. </text:span>Klik één keer met de linkermuisknop op de oefening.</text:p>
      <text:p text:style-name="P11"><draw:frame draw:style-name="fr3" draw:name="Afbeelding4" text:anchor-type="char" svg:x="0.984cm" svg:y="-0.079cm" svg:width="15.208cm" svg:height="10.657cm" draw:z-index="3"><draw:image xlink:href="Pictures/100000010000043B000002F7804FECAA.png" xlink:type="simple" xlink:show="embed" xlink:actuate="onLoad" draw:mime-type="image/png"/></draw:frame></text:p>
      <text:p text:style-name="P11"/>
      <text:p text:style-name="P12"><text:span text:style-name="T10">3</text:span>. <text:span text:style-name="T11">Nadat </text:span><text:span text:style-name="T10">je</text:span><text:span text:style-name="T11"> </text:span><text:span text:style-name="T10">het</text:span><text:span text:style-name="T11"> juiste document hebt geselecteerd, klik </text:span><text:span text:style-name="T10">je </text:span><text:span text:style-name="T11">op <text:s/>‘view raw’ of ‘Download’ (</text:span><text:span text:style-name="T10">knop </text:span><text:span text:style-name="T11">met </text:span><text:span text:style-name="T10">een</text:span><text:span text:style-name="T11"> pijl).</text:span></text:p>
      <text:p text:style-name="P13"><draw:frame draw:style-name="fr1" draw:name="Afbeelding5" text:anchor-type="char" svg:width="17cm" svg:height="6.87cm" draw:z-index="4"><draw:image xlink:href="Pictures/1000000100000751000002F5B2E4B796.png" xlink:type="simple" xlink:show="embed" xlink:actuate="onLoad" draw:mime-type="image/png"/></draw:frame></text:p>
      <text:p text:style-name="P14">Als <text:span text:style-name="T12">je</text:span> <text:span text:style-name="T13">voor</text:span> ‘view raw’ <text:span text:style-name="T13">hebt </text:span>gekozen, kunt <text:span text:style-name="T13">je</text:span> de oefening <text:span text:style-name="T13">nu</text:span> in de <text:span text:style-name="T13">w</text:span>ebbrowser bekijken.</text:p>
      <text:p text:style-name="P15">Als <text:span text:style-name="T12">je</text:span> de oefening <text:span text:style-name="T14">naar je</text:span> computer <text:span text:style-name="T14">wilt</text:span> downloaden en er aantekeningen aan wilt toevoegen, <text:span text:style-name="T14">klik</text:span> dan op de zwarte knop ‘Bestand downloaden’.</text:p>
      <text:p text:style-name="P15"><text:span text:style-name="T13">Je</text:span> kunt de blauwe knop ‘Een kopie bewerken’ allen <text:s/>gebruiken als je bent ingelogd <text:span text:style-name="T14">met een</text:span> Microsoft <text:span text:style-name="T14">account. D</text:span>at doen we momenteel niet.</text:p>
      <text:p text:style-name="P11"/>
      <text:p text:style-name="P11"><draw:frame draw:style-name="fr3" draw:name="Afbeelding6" text:anchor-type="char" svg:x="0cm" svg:y="-0.245cm" svg:width="17cm" svg:height="8.728cm" draw:z-index="5"><draw:image xlink:href="Pictures/1000000100000721000003A99DEF0776.png" xlink:type="simple" xlink:show="embed" xlink:actuate="onLoad" draw:mime-type="image/png"/></draw:frame></text:p>
      <text:p text:style-name="P11"/>
      <text:p text:style-name="P16">4. Als <text:span text:style-name="T15">je</text:span> ‘Bestand download’ <text:span text:style-name="T15">heb</text:span> gekozen, <text:span text:style-name="T15">kunt</text:span> <text:span text:style-name="T15">je</text:span> de bestand <text:span text:style-name="T15">nu</text:span> in <text:span text:style-name="T15">de map </text:span>‘Downloads’ bekijken. Klik op ‘bestand openen’ om <text:span text:style-name="T15">het </text:span>bestand in Microsoft Word <text:span text:style-name="T15">te openen en</text:span> te bewerken.</text:p>
      <text:p text:style-name="P17"><draw:frame draw:style-name="fr3" draw:name="Afbeelding7" text:anchor-type="char" svg:x="2.785cm" svg:y="0.441cm" svg:width="11.43cm" svg:height="6.579cm" draw:z-index="6"><draw:image xlink:href="Pictures/100000010000028800000175F80ADA88.png" xlink:type="simple" xlink:show="embed" xlink:actuate="onLoad" draw:mime-type="image/png"/></draw:frame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04:04:52.391690700</meta:creation-date>
    <dc:date>2026-06-20T21:35:59.443351200</dc:date>
    <meta:editing-duration>PT1H55M14S</meta:editing-duration>
    <meta:editing-cycles>25</meta:editing-cycles>
    <meta:generator>LibreOffice/26.2.1.2$Windows_X86_64 LibreOffice_project/620$Build-2</meta:generator>
    <meta:document-statistic meta:table-count="0" meta:image-count="7" meta:object-count="0" meta:page-count="4" meta:paragraph-count="17" meta:word-count="231" meta:character-count="1366" meta:non-whitespace-character-count="1147"/>
  </office:meta>
</office:document-meta>
</file>