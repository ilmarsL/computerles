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9160e" officeooo:paragraph-rsid="0019160e"/>
    </style:style>
    <style:style style:name="P2" style:family="paragraph" style:parent-style-name="Text_20_body">
      <style:paragraph-properties fo:text-align="start" style:justify-single-word="false"/>
      <style:text-properties officeooo:rsid="0019160e" officeooo:paragraph-rsid="0019160e"/>
    </style:style>
    <style:style style:name="P3" style:family="paragraph" style:parent-style-name="Text_20_body" style:list-style-name="L6">
      <style:paragraph-properties fo:text-align="start" style:justify-single-word="false"/>
      <style:text-properties officeooo:rsid="0019160e" officeooo:paragraph-rsid="0019160e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9160e" officeooo:paragraph-rsid="0019160e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a1a48" officeooo:paragraph-rsid="001a1a48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officeooo:rsid="001a1a48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s 3</text:h>
      <text:p text:style-name="P4">Opdracht 1</text:p>
      <text:p text:style-name="P2">Gebruik een zoekmachine om de website van het Voedingscentrum te vinden en zoek een pagina met recepten.</text:p>
      <text:p text:style-name="Text_20_body"><text:span text:style-name="Strong_20_Emphasis">Tips (optioneel):</text:span></text:p>
      <text:list text:style-name="L1">
        <text:list-item>
          <text:p text:style-name="P7">Open een browser (bijvoorbeeld Google Chrome of Microsoft Edge) </text:p>
        </text:list-item>
        <text:list-item>
          <text:p text:style-name="P7">Ga naar een zoekmachine zoals Google </text:p>
        </text:list-item>
        <text:list-item>
          <text:p text:style-name="P7">Typ: <text:span text:style-name="Emphasis">Voedingscentrum</text:span> </text:p>
        </text:list-item>
        <text:list-item>
          <text:p text:style-name="P6">Klik op de juiste website in de resultaten</text:p>
        </text:list-item>
      </text:list>
      <text:p text:style-name="P2"/>
      <text:p text:style-name="P4">Opdracht: 2</text:p>
      <text:p text:style-name="P2">Maak een nieuwe map op je bureaublad en geef deze de naam: [jouw naam - les 3]</text:p>
      <text:p text:style-name="P4">Tips (optioneel):</text:p>
      <text:list text:style-name="L4">
        <text:list-item>
          <text:p text:style-name="P11">Klik met de rechtermuisknop op het bureaublad</text:p>
        </text:list-item>
        <text:list-item>
          <text:p text:style-name="P11">Kies Nieuw → Map</text:p>
        </text:list-item>
        <text:list-item>
          <text:p text:style-name="P11">Typ de naam en druk op Enter</text:p>
        </text:list-item>
      </text:list>
      <text:p text:style-name="P2"/>
      <text:p text:style-name="P5">Opdracht 3</text:p>
      <text:p text:style-name="P5"><text:span text:style-name="Emphasis"><text:span text:style-name="T2">Maak een document in Microsoft Word over een recept van het Voedingscentrum.</text:span></text:span></text:p>
      <text:p text:style-name="Text_20_body"><text:span text:style-name="Emphasis">Schrijf in het document:</text:span></text:p>
      <text:list text:style-name="L2">
        <text:list-item>
          <text:p text:style-name="P9">De naam van het recept </text:p>
        </text:list-item>
        <text:list-item>
          <text:p text:style-name="P9">De ingrediënten </text:p>
        </text:list-item>
        <text:list-item>
          <text:p text:style-name="P8">Korte bereidingsstappen</text:p>
        </text:list-item>
      </text:list>
      <text:p text:style-name="Text_20_body"><text:span text:style-name="Strong_20_Emphasis">Tips (optioneel):</text:span></text:p>
      <text:list text:style-name="L3">
        <text:list-item>
          <text:p text:style-name="P10">Open Microsoft Word </text:p>
        </text:list-item>
        <text:list-item>
          <text:p text:style-name="P10">Klik op <text:span text:style-name="Emphasis">Nieuw document</text:span> </text:p>
        </text:list-item>
        <text:list-item>
          <text:p text:style-name="P10">Ga terug naar de website van het Voedingscentrum </text:p>
        </text:list-item>
        <text:list-item>
          <text:p text:style-name="P10">Kopieer de informatie en plak deze in je document </text:p>
        </text:list-item>
        <text:list-item>
          <text:p text:style-name="P10">Sla het document op</text:p>
        </text:list-item>
      </text:list>
      <text:p text:style-name="P5"/>
      <text:p text:style-name="P5"/>
      <text:p text:style-name="P5"/>
      <text:p text:style-name="P5"/>
      <text:p text:style-name="P5"><text:soft-page-break/>Opdracht 4</text:p>
      <text:p text:style-name="P2"><text:span text:style-name="Emphasis"><text:span text:style-name="T1">Pa</text:span></text:span><text:span text:style-name="Emphasis">s de opmaak </text:span><text:span text:style-name="Emphasis"><text:span text:style-name="T1">van je document aan</text:span></text:span><text:span text:style-name="Emphasis">.</text:span></text:p>
      <text:p text:style-name="Text_20_body"><text:span text:style-name="Emphasis">Zorg dat:</text:span></text:p>
      <text:list text:style-name="L5">
        <text:list-item>
          <text:p text:style-name="P13">De titel vetgedrukt is </text:p>
        </text:list-item>
        <text:list-item>
          <text:p text:style-name="P13">De titel groter is dan de rest van de tekst </text:p>
        </text:list-item>
        <text:list-item>
          <text:p text:style-name="P13">De ingrediënten als een lijst onder elkaar staan </text:p>
        </text:list-item>
        <text:list-item>
          <text:p text:style-name="P12">De tekst duidelijk leesbaar is</text:p>
        </text:list-item>
      </text:list>
      <text:p text:style-name="P4">Tips (optioneel):</text:p>
      <text:list xml:id="list366176767" text:style-name="L6">
        <text:list-item>
          <text:p text:style-name="P3">Selecteer de tekst die je wilt aanpassen</text:p>
        </text:list-item>
        <text:list-item>
          <text:p text:style-name="P3">Gebruik de knop B voor vetgedrukt</text:p>
        </text:list-item>
        <text:list-item>
          <text:p text:style-name="P3">Pas de lettergrootte aan in het menu bovenaan</text:p>
        </text:list-item>
        <text:list-item>
          <text:p text:style-name="P3">Gebruik opsommingstekens (•) voor een lijst</text:p>
        </text:list-item>
      </text:list>
      <text:p text:style-name="P2"/>
      <text:p text:style-name="Text_20_body"><text:span text:style-name="Strong_20_Emphasis">Opdracht 5 (uitdagend)</text:span></text:p>
      <text:p text:style-name="Text_20_body"><text:span text:style-name="Emphasis">Download en installeer LibreOffice op je computer.</text:span></text:p>
      <text:p text:style-name="Text_20_body"><text:span text:style-name="Strong_20_Emphasis">Tips (optioneel):</text:span></text:p>
      <text:list text:style-name="L7">
        <text:list-item>
          <text:p text:style-name="P15">Open een browser (bijvoorbeeld Google Chrome) </text:p>
        </text:list-item>
        <text:list-item>
          <text:p text:style-name="P15">Ga naar de officiële website van LibreOffice </text:p>
        </text:list-item>
        <text:list-item>
          <text:p text:style-name="P15">Klik op <text:span text:style-name="Emphasis">Downloaden</text:span> </text:p>
        </text:list-item>
        <text:list-item>
          <text:p text:style-name="P15">Open het gedownloade bestand </text:p>
        </text:list-item>
        <text:list-item>
          <text:p text:style-name="P14">Volg de stappen van de installatie 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6:06:34.081247138</meta:creation-date>
    <dc:date>2026-04-13T16:55:11.464807578</dc:date>
    <meta:editing-duration>PT48M3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46" meta:word-count="277" meta:character-count="1513" meta:non-whitespace-character-count="1293"/>
  </office:meta>
</office:document-meta>
</file>