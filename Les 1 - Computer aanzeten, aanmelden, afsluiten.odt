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57600000435221A1E9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7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T1" style:family="text">
      <style:text-properties officeooo:rsid="000fe650"/>
    </style:style>
    <style:style style:name="T2" style:family="text">
      <style:text-properties officeooo:rsid="0010402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efening: Computer opstarten, afsluiten <text:span text:style-name="T1">en bureaublad.</text:span></text:h>
      <text:h text:style-name="Heading_20_2" text:outline-level="2">Doel</text:h>
      <text:p text:style-name="Text_20_body">Je leert:</text:p>
      <text:list text:style-name="L1">
        <text:list-item>
          <text:p text:style-name="P1">de computer aanzetten; </text:p>
        </text:list-item>
        <text:list-item>
          <text:p text:style-name="P1">inloggen in Windows 11; </text:p>
        </text:list-item>
        <text:list-item>
          <text:p text:style-name="P1">het bureaublad herkennen; </text:p>
        </text:list-item>
        <text:list-item>
          <text:p text:style-name="P2">de computer correct afsluiten. </text:p>
        </text:list-item>
      </text:list>
      <text:p text:style-name="Horizontal_20_Line"/>
      <text:h text:style-name="Heading_20_2" text:outline-level="2">Deel 1: Computer aanzetten</text:h>
      <text:h text:style-name="Heading_20_3" text:outline-level="3">Instructie</text:h>
      <text:list text:style-name="L2">
        <text:list-item>
          <text:p text:style-name="P3">Zoek de aan/uit-knop van de computer of laptop. </text:p>
        </text:list-item>
        <text:list-item>
          <text:p text:style-name="P3">Druk één keer op de knop. </text:p>
        </text:list-item>
        <text:list-item>
          <text:p text:style-name="P4">Wacht totdat het Windows-aanmeldscherm verschijnt. </text:p>
        </text:list-item>
      </text:list>
      <text:h text:style-name="Heading_20_3" text:outline-level="3">Opdracht</text:h>
      <text:list text:style-name="L3">
        <text:list-item>
          <text:p text:style-name="P5">Zet de computer aan. </text:p>
        </text:list-item>
        <text:list-item>
          <text:p text:style-name="P6">Wacht tot je het inlogscherm ziet. </text:p>
        </text:list-item>
      </text:list>
      <text:p text:style-name="Horizontal_20_Line"/>
      <text:h text:style-name="Heading_20_2" text:outline-level="2">Deel 2: Inloggen in Windows 11</text:h>
      <text:h text:style-name="Heading_20_3" text:outline-level="3">Instructie</text:h>
      <text:list text:style-name="L4">
        <text:list-item>
          <text:p text:style-name="P7">Klik op het scherm of druk op een toets. </text:p>
        </text:list-item>
        <text:list-item>
          <text:p text:style-name="P7">Typ je wachtwoord of pincode. </text:p>
        </text:list-item>
        <text:list-item>
          <text:p text:style-name="P8">Druk op <text:span text:style-name="Strong_20_Emphasis">Enter</text:span> of klik op de pijl. </text:p>
        </text:list-item>
      </text:list>
      <text:h text:style-name="Heading_20_3" text:outline-level="3">Opdracht</text:h>
      <text:list text:style-name="L5">
        <text:list-item>
          <text:p text:style-name="P9">Log in met je eigen account. </text:p>
        </text:list-item>
      </text:list>
      <text:p text:style-name="Horizontal_20_Line"/>
      <text:h text:style-name="Heading_20_2" text:outline-level="2">Deel 3: Het bureaublad verkennen</text:h>
      <text:h text:style-name="Heading_20_3" text:outline-level="3">Instructie</text:h>
      <text:p text:style-name="Text_20_body">Bekijk het bureaublad nadat je bent ingelogd.</text:p>
      <text:h text:style-name="Heading_20_3" text:outline-level="3"><text:soft-page-break/>Opdracht</text:h>
      <text:p text:style-name="Text_20_body">Zoek en wijs aan:</text:p>
      <text:list text:style-name="L6">
        <text:list-item>
          <text:p text:style-name="P10">Het <text:span text:style-name="Strong_20_Emphasis">Startmenu</text:span>. </text:p>
        </text:list-item>
        <text:list-item>
          <text:p text:style-name="P10">De <text:span text:style-name="Strong_20_Emphasis">taakbalk</text:span>. </text:p>
        </text:list-item>
        <text:list-item>
          <text:p text:style-name="P10">Een <text:span text:style-name="Strong_20_Emphasis">programma</text:span>, <text:span text:style-name="Strong_20_Emphasis">map</text:span> of <text:span text:style-name="Strong_20_Emphasis">bestand</text:span> op het bureaublad. </text:p>
        </text:list-item>
        <text:list-item>
          <text:p text:style-name="P11">De <text:span text:style-name="Strong_20_Emphasis">klok</text:span> rechtsonder. </text:p>
        </text:list-item>
      </text:list>
      <text:h text:style-name="Heading_20_2" text:outline-level="2">Deel 4: Computer afsluiten</text:h>
      <text:h text:style-name="Heading_20_3" text:outline-level="3">Instructie</text:h>
      <text:list text:style-name="L7">
        <text:list-item>
          <text:p text:style-name="P12">Klik op de <text:span text:style-name="Strong_20_Emphasis">Startknop </text:span><text:span text:style-name="Strong_20_Emphasis"><text:span text:style-name="T2">(1)</text:span></text:span>. </text:p>
        </text:list-item>
        <text:list-item>
          <text:p text:style-name="P12">Klik op het <text:span text:style-name="Strong_20_Emphasis">aan/uit-pictogram </text:span><text:span text:style-name="Strong_20_Emphasis"><text:span text:style-name="T2">(2)</text:span></text:span>. </text:p>
        </text:list-item>
        <text:list-item>
          <text:p text:style-name="P12">Klik op <text:span text:style-name="Strong_20_Emphasis">Afsluiten </text:span><text:span text:style-name="Strong_20_Emphasis"><text:span text:style-name="T2">(3)</text:span></text:span>. </text:p>
        </text:list-item>
        <text:list-item>
          <text:p text:style-name="P13">Wacht totdat de computer volledig uit staat. </text:p>
        </text:list-item>
      </text:list>
      <text:p text:style-name="Text_20_body"><draw:frame draw:style-name="fr1" draw:name="Afbeelding1" text:anchor-type="char" svg:width="17cm" svg:height="13.097cm" draw:z-index="0"><draw:image xlink:href="Pictures/100000010000057600000435221A1E9D.png" xlink:type="simple" xlink:show="embed" xlink:actuate="onLoad" draw:mime-type="image/png"/></draw:frame></text:p>
      <text:h text:style-name="Heading_20_3" text:outline-level="3">Opdracht</text:h>
      <text:list text:style-name="L8">
        <text:list-item>
          <text:p text:style-name="P14">Sluit de computer correct af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5T16:23:12.553875600</meta:creation-date>
    <dc:date>2026-06-15T16:33:22.747089200</dc:date>
    <meta:editing-duration>PT10M10S</meta:editing-duration>
    <meta:editing-cycles>3</meta:editing-cycles>
    <meta:generator>LibreOffice/26.2.1.2$Windows_X86_64 LibreOffice_project/620$Build-2</meta:generator>
    <meta:document-statistic meta:table-count="0" meta:image-count="1" meta:object-count="0" meta:page-count="2" meta:paragraph-count="39" meta:word-count="181" meta:character-count="1026" meta:non-whitespace-character-count="885"/>
  </office:meta>
</office:document-meta>
</file>