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3200000415139BABF9.png" manifest:media-type="image/png"/>
  <manifest:file-entry manifest:full-path="Pictures/10000001000004D100000367C437C546.png" manifest:media-type="image/png"/>
  <manifest:file-entry manifest:full-path="Pictures/10000001000004D5000002B903D35B44.png" manifest:media-type="image/png"/>
  <manifest:file-entry manifest:full-path="Pictures/10000001000005DF000003F8EC1E9017.png" manifest:media-type="image/png"/>
  <manifest:file-entry manifest:full-path="Pictures/10000001000005550000041C6FC8E81A.png" manifest:media-type="image/png"/>
  <manifest:file-entry manifest:full-path="Pictures/10000001000004A8000002AAB2CCE33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>
      <style:paragraph-properties fo:break-before="page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Heading_20_3">
      <style:paragraph-properties fo:break-before="page"/>
    </style:style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>
      <style:text-properties officeooo:paragraph-rsid="0017c399"/>
    </style:style>
    <style:style style:name="P14" style:family="paragraph" style:parent-style-name="Heading_20_3">
      <style:text-properties officeooo:paragraph-rsid="001445b2"/>
    </style:style>
    <style:style style:name="P15" style:family="paragraph" style:parent-style-name="Heading_20_3">
      <style:paragraph-properties fo:break-before="page"/>
      <style:text-properties officeooo:paragraph-rsid="001445b2"/>
    </style:style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9">
      <style:paragraph-properties fo:margin-top="0cm" fo:margin-bottom="0cm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10">
      <style:paragraph-properties fo:margin-top="0cm" fo:margin-bottom="0cm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1">
      <style:paragraph-properties fo:margin-top="0cm" fo:margin-bottom="0cm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2">
      <style:paragraph-properties fo:margin-top="0cm" fo:margin-bottom="0cm" style:contextual-spacing="false"/>
    </style:style>
    <style:style style:name="P29" style:family="paragraph" style:parent-style-name="Text_20_body" style:list-style-name="L12"/>
    <style:style style:name="P30" style:family="paragraph" style:parent-style-name="Text_20_body" style:list-style-name="L13">
      <style:paragraph-properties fo:margin-top="0cm" fo:margin-bottom="0cm" style:contextual-spacing="false"/>
    </style:style>
    <style:style style:name="P31" style:family="paragraph" style:parent-style-name="Text_20_body" style:list-style-name="L13"/>
    <style:style style:name="P32" style:family="paragraph" style:parent-style-name="Text_20_body" style:list-style-name="L14">
      <style:paragraph-properties fo:margin-top="0cm" fo:margin-bottom="0cm" style:contextual-spacing="false"/>
    </style:style>
    <style:style style:name="P33" style:family="paragraph" style:parent-style-name="Text_20_body" style:list-style-name="L14"/>
    <style:style style:name="P34" style:family="paragraph" style:parent-style-name="Text_20_body" style:list-style-name="L15"/>
    <style:style style:name="P35" style:family="paragraph" style:parent-style-name="Text_20_body" style:list-style-name="L16">
      <style:paragraph-properties fo:margin-top="0cm" fo:margin-bottom="0cm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7"/>
    <style:style style:name="P38" style:family="paragraph" style:parent-style-name="Text_20_body" style:list-style-name="L18">
      <style:paragraph-properties fo:margin-top="0cm" fo:margin-bottom="0cm" style:contextual-spacing="false"/>
    </style:style>
    <style:style style:name="P39" style:family="paragraph" style:parent-style-name="Text_20_body" style:list-style-name="L18"/>
    <style:style style:name="P40" style:family="paragraph" style:parent-style-name="Text_20_body" style:list-style-name="L19">
      <style:paragraph-properties fo:margin-top="0cm" fo:margin-bottom="0cm" style:contextual-spacing="false"/>
    </style:style>
    <style:style style:name="P41" style:family="paragraph" style:parent-style-name="Text_20_body" style:list-style-name="L19"/>
    <style:style style:name="P42" style:family="paragraph" style:parent-style-name="Text_20_body" style:list-style-name="L20">
      <style:paragraph-properties fo:margin-top="0cm" fo:margin-bottom="0cm" style:contextual-spacing="false"/>
    </style:style>
    <style:style style:name="P43" style:family="paragraph" style:parent-style-name="Text_20_body" style:list-style-name="L20"/>
    <style:style style:name="P44" style:family="paragraph" style:parent-style-name="Text_20_body" style:list-style-name="L21"/>
    <style:style style:name="P45" style:family="paragraph" style:parent-style-name="Text_20_body" style:list-style-name="L22">
      <style:paragraph-properties fo:margin-top="0cm" fo:margin-bottom="0cm" style:contextual-spacing="false"/>
    </style:style>
    <style:style style:name="P46" style:family="paragraph" style:parent-style-name="Text_20_body" style:list-style-name="L22"/>
    <style:style style:name="P47" style:family="paragraph" style:parent-style-name="Preformatted_20_Text">
      <style:paragraph-properties fo:margin-top="0cm" fo:margin-bottom="0.499cm" style:contextual-spacing="false"/>
    </style:style>
    <style:style style:name="P48" style:family="paragraph" style:parent-style-name="Text_20_body">
      <style:text-properties officeooo:paragraph-rsid="001445b2"/>
    </style:style>
    <style:style style:name="P49" style:family="paragraph" style:parent-style-name="Text_20_body" style:list-style-name="L23">
      <style:paragraph-properties fo:margin-top="0cm" fo:margin-bottom="0cm" style:contextual-spacing="false"/>
      <style:text-properties officeooo:paragraph-rsid="001445b2"/>
    </style:style>
    <style:style style:name="P50" style:family="paragraph" style:parent-style-name="Text_20_body" style:list-style-name="L23">
      <style:text-properties officeooo:paragraph-rsid="001445b2"/>
    </style:style>
    <style:style style:name="P51" style:family="paragraph" style:parent-style-name="Text_20_body" style:list-style-name="L24">
      <style:paragraph-properties fo:margin-top="0cm" fo:margin-bottom="0cm" style:contextual-spacing="false"/>
      <style:text-properties officeooo:paragraph-rsid="001445b2"/>
    </style:style>
    <style:style style:name="P52" style:family="paragraph" style:parent-style-name="Text_20_body" style:list-style-name="L24">
      <style:text-properties officeooo:paragraph-rsid="001445b2"/>
    </style:style>
    <style:style style:name="T1" style:family="text">
      <style:text-properties fo:font-weight="bold" officeooo:rsid="001626d7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45b2"/>
    </style:style>
    <style:style style:name="T4" style:family="text">
      <style:text-properties officeooo:rsid="00191803"/>
    </style:style>
    <style:style style:name="T5" style:family="text">
      <style:text-properties officeooo:rsid="001c941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Werken met mappen en bestanden in Windows 11</text:h>
      <text:h text:style-name="Heading_20_3" text:outline-level="3">Doel van de oefening</text:h>
      <text:p text:style-name="Text_20_body">Je leert:</text:p>
      <text:list text:style-name="L1">
        <text:list-item>
          <text:p text:style-name="P1">mappen maken </text:p>
        </text:list-item>
        <text:list-item>
          <text:p text:style-name="P1">bestanden kopiëren, verplaatsen en verwijderen </text:p>
        </text:list-item>
        <text:list-item>
          <text:p text:style-name="P1">het Bureaublad openen via Bestandsverkenner </text:p>
        </text:list-item>
        <text:list-item>
          <text:p text:style-name="P2">foto's van een telefoon naar een pc kopiëren </text:p>
        </text:list-item>
      </text:list>
      <text:p text:style-name="Horizontal_20_Line"/>
      <text:h text:style-name="Heading_20_3" text:outline-level="3">Opdracht 1: Open Bestandsverkenner</text:h>
      <text:list text:style-name="L2">
        <text:list-item>
          <text:p text:style-name="P3">Klik op de <text:span text:style-name="Strong_20_Emphasis">Startknop</text:span>. </text:p>
        </text:list-item>
        <text:list-item>
          <text:p text:style-name="P3">Typ: <text:span text:style-name="T1">V</text:span><text:span text:style-name="Strong_20_Emphasis"><text:span text:style-name="T2">erkenner</text:span></text:span>. </text:p>
        </text:list-item>
        <text:list-item>
          <text:p text:style-name="P4">Klik op <text:span text:style-name="T1">V</text:span><text:span text:style-name="Strong_20_Emphasis">erkenner</text:span>. </text:p>
          <text:p text:style-name="P4"><draw:frame draw:style-name="fr1" draw:name="Afbeelding1" text:anchor-type="char" svg:width="16.249cm" svg:height="11.125cm" draw:z-index="0"><draw:image xlink:href="Pictures/100000010000053200000415139BABF9.png" xlink:type="simple" xlink:show="embed" xlink:actuate="onLoad" draw:mime-type="image/png"/></draw:frame></text:p>
        </text:list-item>
      </text:list>
      <text:p text:style-name="Text_20_body"><text:span text:style-name="Strong_20_Emphasis">Controle:</text:span> Zie je links menu's zoals <text:span text:style-name="Emphasis">Bureaublad</text:span>, <text:span text:style-name="Emphasis">Documenten</text:span> en <text:span text:style-name="Emphasis">Downloads</text:span>?</text:p>
      <text:p text:style-name="P5"/>
      <text:h text:style-name="Heading_20_3" text:outline-level="3">Opdracht 2: Open het Bureaublad in Bestandsverkenner</text:h>
      <text:list text:style-name="L3">
        <text:list-item>
          <text:p text:style-name="P6">Open <text:span text:style-name="Strong_20_Emphasis">Bestandsverkenner</text:span>. </text:p>
        </text:list-item>
        <text:list-item>
          <text:p text:style-name="P6">Zoek links naar <text:span text:style-name="Strong_20_Emphasis">Bureaublad</text:span>. </text:p>
        </text:list-item>
        <text:list-item>
          <text:p text:style-name="P7">Klik op <text:span text:style-name="Strong_20_Emphasis">Bureaublad</text:span>. </text:p>
        </text:list-item>
      </text:list>
      <text:p text:style-name="Text_20_body"><text:span text:style-name="Strong_20_Emphasis">Controle:</text:span> Zie je dezelfde bestanden als op je normale bureaublad?</text:p>
      <text:p text:style-name="Text_20_body"><draw:frame draw:style-name="fr2" draw:name="Afbeelding2" text:anchor-type="char" svg:width="17cm" svg:height="12.009cm" draw:z-index="1"><draw:image xlink:href="Pictures/10000001000004D100000367C437C546.png" xlink:type="simple" xlink:show="embed" xlink:actuate="onLoad" draw:mime-type="image/png"/></draw:frame></text:p>
      <text:h text:style-name="Heading_20_3" text:outline-level="3"/>
      <text:h text:style-name="P8" text:outline-level="3">Opdracht 3: Maak nieuwe mappen</text:h>
      <text:list text:style-name="L4">
        <text:list-item>
          <text:p text:style-name="P9">Open <text:span text:style-name="Strong_20_Emphasis">Bureaublad</text:span> in Bestandsverkenner. </text:p>
        </text:list-item>
        <text:list-item>
          <text:p text:style-name="P9">Klik met de <text:span text:style-name="Strong_20_Emphasis">rechtermuisknop</text:span> op een lege plaats. </text:p>
        </text:list-item>
        <text:list-item>
          <text:p text:style-name="P9">Kies <text:span text:style-name="Strong_20_Emphasis">Nieuw → Map</text:span>. </text:p>
        </text:list-item>
        <text:list-item>
          <text:p text:style-name="P10">Maak deze drie mappen: </text:p>
        </text:list-item>
      </text:list>
      <text:list text:style-name="L5">
        <text:list-item>
          <text:p text:style-name="P11">Vakantie </text:p>
        </text:list-item>
        <text:list-item>
          <text:p text:style-name="P11">Werk </text:p>
        </text:list-item>
        <text:list-item>
          <text:p text:style-name="P12">Oefening </text:p>
        </text:list-item>
      </text:list>
      <text:p text:style-name="P13"/>
      <text:p text:style-name="P13"><draw:frame draw:style-name="fr2" draw:name="Afbeelding4" text:anchor-type="char" svg:width="17cm" svg:height="11.492cm" draw:z-index="3"><draw:image xlink:href="Pictures/10000001000005DF000003F8EC1E9017.png" xlink:type="simple" xlink:show="embed" xlink:actuate="onLoad" draw:mime-type="image/png"/></draw:frame></text:p>
      <text:h text:style-name="P14" text:outline-level="3"/>
      <text:h text:style-name="P15" text:outline-level="3">Opdracht 4: Bestanden maken, <text:span text:style-name="T3">m</text:span>aak oefenbestanden</text:h>
      <text:list text:style-name="L6">
        <text:list-item>
          <text:p text:style-name="P16">Open <text:span text:style-name="Strong_20_Emphasis">Kladblok</text:span>. </text:p>
        </text:list-item>
        <text:list-item>
          <text:p text:style-name="P16">Typ: <text:span text:style-name="Source_20_Text">Dit is bestand 1</text:span> </text:p>
        </text:list-item>
        <text:list-item>
          <text:p text:style-name="P16">Klik op <text:span text:style-name="Strong_20_Emphasis">Bestand → Opslaan als</text:span>. </text:p>
        </text:list-item>
        <text:list-item>
          <text:p text:style-name="P16">Sla op als: <text:span text:style-name="Source_20_Text">bestand1.txt</text:span> in map <text:span text:style-name="Strong_20_Emphasis">Oefening</text:span>. </text:p>
        </text:list-item>
        <text:list-item>
          <text:p text:style-name="P17">Maak ook: </text:p>
        </text:list-item>
      </text:list>
      <text:list text:style-name="L7">
        <text:list-item>
          <text:p text:style-name="P18">bestand2.txt </text:p>
        </text:list-item>
        <text:list-item>
          <text:p text:style-name="P19">bestand3.txt </text:p>
        </text:list-item>
      </text:list>
      <text:p text:style-name="Text_20_body"><draw:frame draw:style-name="fr3" draw:name="Afbeelding3" text:anchor-type="char" svg:width="12.908cm" svg:height="9.948cm" draw:z-index="2"><draw:image xlink:href="Pictures/10000001000005550000041C6FC8E81A.png" xlink:type="simple" xlink:show="embed" xlink:actuate="onLoad" draw:mime-type="image/png"/></draw:frame><draw:frame draw:style-name="fr4" draw:name="Afbeelding5" text:anchor-type="char" svg:x="1.438cm" svg:y="10.044cm" svg:width="14.106cm" svg:height="8.072cm" draw:z-index="4"><draw:image xlink:href="Pictures/10000001000004A8000002AAB2CCE33D.png" xlink:type="simple" xlink:show="embed" xlink:actuate="onLoad" draw:mime-type="image/png"/></draw:frame></text:p>
      <text:p text:style-name="P5"/>
      <text:h text:style-name="Heading_20_3" text:outline-level="3">Opdracht 5: Bestanden kopiëren</text:h>
      <text:list text:style-name="L8">
        <text:list-item>
          <text:p text:style-name="P20">Open map <text:span text:style-name="Strong_20_Emphasis">Oefening</text:span>. </text:p>
        </text:list-item>
        <text:list-item>
          <text:p text:style-name="P20">Klik op <text:span text:style-name="Source_20_Text">bestand1.txt</text:span>. </text:p>
        </text:list-item>
        <text:list-item>
          <text:p text:style-name="P20">Druk <text:span text:style-name="Strong_20_Emphasis">Ctrl + C</text:span>. <text:span text:style-name="T4">(Op het toetsenbord)</text:span></text:p>
        </text:list-item>
        <text:list-item>
          <text:p text:style-name="P20">Open map <text:span text:style-name="Strong_20_Emphasis">Werk</text:span>. </text:p>
        </text:list-item>
        <text:list-item>
          <text:p text:style-name="P21">Druk <text:span text:style-name="Strong_20_Emphasis">Ctrl + V</text:span>. </text:p>
        </text:list-item>
      </text:list>
      <text:p text:style-name="Text_20_body"><text:span text:style-name="Strong_20_Emphasis">Vraag:</text:span> Staat het bestand nu in beide mappen?</text:p>
      <text:p text:style-name="Horizontal_20_Line"/>
      <text:h text:style-name="Heading_20_3" text:outline-level="3">Opdracht 6: Bestand verplaatsen</text:h>
      <text:list text:style-name="L9">
        <text:list-item>
          <text:p text:style-name="P22">Open map <text:span text:style-name="Strong_20_Emphasis">Oefening</text:span>. </text:p>
        </text:list-item>
        <text:list-item>
          <text:p text:style-name="P22">Klik op <text:span text:style-name="Source_20_Text">bestand2.txt</text:span>. </text:p>
        </text:list-item>
        <text:list-item>
          <text:p text:style-name="P22">Druk <text:span text:style-name="Strong_20_Emphasis">Ctrl + X</text:span>. </text:p>
        </text:list-item>
        <text:list-item>
          <text:p text:style-name="P22">Open map <text:span text:style-name="Strong_20_Emphasis">Vakantie</text:span>. </text:p>
        </text:list-item>
        <text:list-item>
          <text:p text:style-name="P23">Druk <text:span text:style-name="Strong_20_Emphasis">Ctrl + V</text:span>. </text:p>
        </text:list-item>
      </text:list>
      <text:p text:style-name="Text_20_body"><text:span text:style-name="Strong_20_Emphasis">Vraag:</text:span> Is het bestand verdwenen uit de oude map?</text:p>
      <text:p text:style-name="Horizontal_20_Line"/>
      <text:h text:style-name="Heading_20_3" text:outline-level="3">Opdracht 7: Bestand verwijderen</text:h>
      <text:list text:style-name="L10">
        <text:list-item>
          <text:p text:style-name="P24">Open map <text:span text:style-name="Strong_20_Emphasis">Oefening</text:span>. </text:p>
        </text:list-item>
        <text:list-item>
          <text:p text:style-name="P24">Klik op <text:span text:style-name="Source_20_Text">bestand3.txt</text:span>. </text:p>
        </text:list-item>
        <text:list-item>
          <text:p text:style-name="P24">Druk op <text:span text:style-name="Strong_20_Emphasis">Delete</text:span>. </text:p>
        </text:list-item>
        <text:list-item>
          <text:p text:style-name="P25">Open de <text:span text:style-name="Strong_20_Emphasis">Prullenbak</text:span>. </text:p>
        </text:list-item>
      </text:list>
      <text:p text:style-name="Text_20_body"><text:span text:style-name="Strong_20_Emphasis">Vraag:</text:span> Waar staat het bestand nu?</text:p>
      <text:h text:style-name="Heading_20_3" text:outline-level="3">Extra opdracht:</text:h>
      <text:p text:style-name="Text_20_body">Herstel het bestand uit de Prullenbak.</text:p>
      <text:p text:style-name="Horizontal_20_Line"/>
      <text:h text:style-name="Heading_20_3" text:outline-level="3">Opdracht 8: Foto’s kopiëren van telefoon naar computer</text:h>
      <text:list text:style-name="L11">
        <text:list-item>
          <text:p text:style-name="P26">Verbind je telefoon met een <text:span text:style-name="Strong_20_Emphasis">USB-kabel</text:span> aan de pc. </text:p>
        </text:list-item>
        <text:list-item>
          <text:p text:style-name="P26">Ontgrendel je telefoon. </text:p>
        </text:list-item>
        <text:list-item>
          <text:p text:style-name="P26">Kies op de telefoon eventueel: <text:span text:style-name="Strong_20_Emphasis">Bestandsoverdracht / File transfer</text:span>. </text:p>
        </text:list-item>
        <text:list-item>
          <text:p text:style-name="P26">Open <text:span text:style-name="Strong_20_Emphasis">Bestandsverkenner</text:span>. </text:p>
        </text:list-item>
        <text:list-item>
          <text:p text:style-name="P26">Zoek links je telefoon. </text:p>
        </text:list-item>
        <text:list-item>
          <text:p text:style-name="P26">Open de map met foto's (vaak <text:span text:style-name="Strong_20_Emphasis">DCIM</text:span> of <text:span text:style-name="Strong_20_Emphasis">Camera</text:span>). </text:p>
        </text:list-item>
        <text:list-item>
          <text:p text:style-name="P26">Selecteer 3 foto's. </text:p>
        </text:list-item>
        <text:list-item>
          <text:p text:style-name="P26">Druk <text:span text:style-name="Strong_20_Emphasis">Ctrl + C</text:span>. </text:p>
        </text:list-item>
        <text:list-item>
          <text:p text:style-name="P26"><text:soft-page-break/>Open map <text:span text:style-name="Strong_20_Emphasis">Vakantie</text:span> op het bureaublad. </text:p>
        </text:list-item>
        <text:list-item>
          <text:p text:style-name="P27">Druk <text:span text:style-name="Strong_20_Emphasis">Ctrl + V</text:span>. </text:p>
        </text:list-item>
      </text:list>
      <text:p text:style-name="Text_20_body"><text:span text:style-name="Strong_20_Emphasis">Controle:</text:span> Staan de foto's nu op de computer?</text:p>
      <text:p text:style-name="Horizontal_20_Line"/>
      <text:h text:style-name="Heading_20_3" text:outline-level="3">Opdracht 9: Meerdere bestanden tegelijk selecteren</text:h>
      <text:list text:style-name="L12">
        <text:list-item>
          <text:p text:style-name="P28">Open map <text:span text:style-name="Strong_20_Emphasis">Computerles</text:span>. </text:p>
        </text:list-item>
        <text:list-item>
          <text:p text:style-name="P28">Maak 5 nieuwe tekstbestanden. </text:p>
        </text:list-item>
        <text:list-item>
          <text:p text:style-name="P28">Houd <text:span text:style-name="Strong_20_Emphasis">Ctrl</text:span> ingedrukt. </text:p>
        </text:list-item>
        <text:list-item>
          <text:p text:style-name="P28">Klik op 3 verschillende bestanden. </text:p>
        </text:list-item>
        <text:list-item>
          <text:p text:style-name="P28">Klik met de rechtermuisknop. </text:p>
        </text:list-item>
        <text:list-item>
          <text:p text:style-name="P28">Kies <text:span text:style-name="Strong_20_Emphasis">Kopiëren</text:span>. </text:p>
        </text:list-item>
        <text:list-item>
          <text:p text:style-name="P29">Plak ze in een andere map. </text:p>
        </text:list-item>
      </text:list>
      <text:p text:style-name="Text_20_body"><text:span text:style-name="Strong_20_Emphasis">Vraag:</text:span> Zijn alleen de gekozen bestanden gekopieerd?</text:p>
      <text:p text:style-name="Horizontal_20_Line"/>
      <text:h text:style-name="Heading_20_3" text:outline-level="3">Opdracht 10: Alles selecteren</text:h>
      <text:list text:style-name="L13">
        <text:list-item>
          <text:p text:style-name="P30">Open map <text:span text:style-name="Strong_20_Emphasis">Documenten</text:span>. </text:p>
        </text:list-item>
        <text:list-item>
          <text:p text:style-name="P30">Druk <text:span text:style-name="Strong_20_Emphasis">Ctrl + A</text:span>. </text:p>
        </text:list-item>
        <text:list-item>
          <text:p text:style-name="P30">Kijk hoeveel bestanden geselecteerd zijn. </text:p>
        </text:list-item>
        <text:list-item>
          <text:p text:style-name="P31">Klik ergens anders om selectie weg te halen. </text:p>
        </text:list-item>
      </text:list>
      <text:p text:style-name="Text_20_body"><text:span text:style-name="Strong_20_Emphasis">Doel:</text:span> Leren hoe je veel bestanden tegelijk kiest.</text:p>
      <text:p text:style-name="Horizontal_20_Line"/>
      <text:h text:style-name="Heading_20_3" text:outline-level="3">Opdracht 11: Bestand hernoemen</text:h>
      <text:list text:style-name="L14">
        <text:list-item>
          <text:p text:style-name="P32">Klik met de rechtermuisknop op een tekstbestand. </text:p>
        </text:list-item>
        <text:list-item>
          <text:p text:style-name="P32">Kies <text:span text:style-name="Strong_20_Emphasis">Naam wijzigen</text:span>. </text:p>
        </text:list-item>
        <text:list-item>
          <text:p text:style-name="P33">Verander de naam naar: </text:p>
        </text:list-item>
      </text:list>
      <text:p text:style-name="Text_20_body"><text:span text:style-name="Source_20_Text">boodschappenlijst.txt</text:span></text:p>
      <text:list text:style-name="L15">
        <text:list-item>
          <text:p text:style-name="P34">Druk op <text:span text:style-name="Strong_20_Emphasis">Enter</text:span>. </text:p>
        </text:list-item>
      </text:list>
      <text:p text:style-name="Text_20_body"><text:span text:style-name="Strong_20_Emphasis">Vraag:</text:span> Is alleen de naam veranderd of ook de inhoud?</text:p>
      <text:p text:style-name="Horizontal_20_Line"/>
      <text:h text:style-name="Heading_20_3" text:outline-level="3"/>
      <text:h text:style-name="P8" text:outline-level="3">Opdracht 12: Bestand zoeken</text:h>
      <text:list text:style-name="L16">
        <text:list-item>
          <text:p text:style-name="P35">Open <text:span text:style-name="Strong_20_Emphasis">Bestandsverkenner</text:span>. </text:p>
        </text:list-item>
        <text:list-item>
          <text:p text:style-name="P35">Open map <text:span text:style-name="Strong_20_Emphasis">Computerles</text:span>. </text:p>
        </text:list-item>
        <text:list-item>
          <text:p text:style-name="P36">Typ rechtsboven in het zoekvak: </text:p>
        </text:list-item>
      </text:list>
      <text:p text:style-name="Text_20_body"><text:span text:style-name="Source_20_Text">bestand</text:span></text:p>
      <text:list text:style-name="L17">
        <text:list-item>
          <text:p text:style-name="P37">Bekijk welke resultaten verschijnen. </text:p>
        </text:list-item>
      </text:list>
      <text:p text:style-name="Text_20_body"><text:span text:style-name="Strong_20_Emphasis">Doel:</text:span> Leren bestanden terugvinden.</text:p>
      <text:p text:style-name="Text_20_body"><draw:frame draw:style-name="fr5" draw:name="Afbeelding6" text:anchor-type="char" svg:width="17cm" svg:height="9.578cm" draw:z-index="5"><draw:image xlink:href="Pictures/10000001000004D5000002B903D35B44.png" xlink:type="simple" xlink:show="embed" xlink:actuate="onLoad" draw:mime-type="image/png"/></draw:frame></text:p>
      <text:p text:style-name="Horizontal_20_Line"/>
      <text:h text:style-name="Heading_20_3" text:outline-level="3">Opdracht 13: Bestanden sorteren</text:h>
      <text:list text:style-name="L18">
        <text:list-item>
          <text:p text:style-name="P38">Open een map met meerdere bestanden. </text:p>
        </text:list-item>
        <text:list-item>
          <text:p text:style-name="P38">Klik bovenaan op <text:span text:style-name="Strong_20_Emphasis">Sorteren</text:span>. </text:p>
        </text:list-item>
        <text:list-item>
          <text:p text:style-name="P39">Sorteer op: </text:p>
        </text:list-item>
      </text:list>
      <text:list text:style-name="L19">
        <text:list-item>
          <text:p text:style-name="P40">Naam </text:p>
        </text:list-item>
        <text:list-item>
          <text:p text:style-name="P40">Datum gewijzigd </text:p>
        </text:list-item>
        <text:list-item>
          <text:p text:style-name="P41">Type </text:p>
        </text:list-item>
      </text:list>
      <text:p text:style-name="Text_20_body"><text:span text:style-name="Strong_20_Emphasis">Vraag:</text:span> Wat verandert er?</text:p>
      <text:p text:style-name="Horizontal_20_Line"/>
      <text:h text:style-name="Heading_20_3" text:outline-level="3"/>
      <text:h text:style-name="P8" text:outline-level="3">Opdracht 14: Een fout herstellen</text:h>
      <text:list text:style-name="L20">
        <text:list-item>
          <text:p text:style-name="P42">Verplaats een bestand naar een verkeerde map. </text:p>
        </text:list-item>
        <text:list-item>
          <text:p text:style-name="P43">Druk direct op: </text:p>
        </text:list-item>
      </text:list>
      <text:p text:style-name="Text_20_body"><text:span text:style-name="Strong_20_Emphasis">Ctrl + Z </text:span><text:span text:style-name="Strong_20_Emphasis"><text:span text:style-name="T5">(op het toetsenbord)</text:span></text:span></text:p>
      <text:list text:style-name="L21">
        <text:list-item>
          <text:p text:style-name="P44">Controleer waar het bestand nu staat. </text:p>
        </text:list-item>
      </text:list>
      <text:p text:style-name="Text_20_body"><text:span text:style-name="Strong_20_Emphasis">Doel:</text:span> Leren fouten snel herstellen.</text:p>
      <text:p text:style-name="Horizontal_20_Line"/>
      <text:h text:style-name="Heading_20_3" text:outline-level="3">Opdracht 15: Bestand openen</text:h>
      <text:list text:style-name="L22">
        <text:list-item>
          <text:p text:style-name="P45">Open map <text:span text:style-name="Strong_20_Emphasis">Documenten</text:span>. </text:p>
        </text:list-item>
        <text:list-item>
          <text:p text:style-name="P45">Dubbelklik op een tekstbestand. </text:p>
        </text:list-item>
        <text:list-item>
          <text:p text:style-name="P45">Lees de inhoud. </text:p>
        </text:list-item>
        <text:list-item>
          <text:p text:style-name="P46">Sluit het programma weer. </text:p>
        </text:list-item>
      </text:list>
      <text:p text:style-name="Text_20_body"><text:span text:style-name="Strong_20_Emphasis">Vraag:</text:span> Welk programma werd geopend?</text:p>
      <text:p text:style-name="Horizontal_20_Line"/>
      <text:h text:style-name="Heading_20_2" text:outline-level="2">Uitdaging (optioneel)</text:h>
      <text:h text:style-name="Heading_20_3" text:outline-level="3">Opdracht 16: Maak zelf een mappenstructuur</text:h>
      <text:p text:style-name="Text_20_body">Maak deze structuur:</text:p>
      <text:section text:style-name="Sect1" text:name="code-block-viewer">
        <text:p text:style-name="Preformatted_20_Text"><text:span text:style-name="Source_20_Text">Computerles</text:span></text:p>
        <text:p text:style-name="Preformatted_20_Text"><text:span text:style-name="Source_20_Text">│</text:span></text:p>
        <text:p text:style-name="Preformatted_20_Text"><text:span text:style-name="Source_20_Text">├── Werk</text:span></text:p>
        <text:p text:style-name="Preformatted_20_Text"><text:span text:style-name="Source_20_Text">│ <text:s text:c="2"/>├── Facturen</text:span></text:p>
        <text:p text:style-name="Preformatted_20_Text"><text:span text:style-name="Source_20_Text">│ <text:s text:c="2"/>└── Planning</text:span></text:p>
        <text:p text:style-name="Preformatted_20_Text"><text:span text:style-name="Source_20_Text">│</text:span></text:p>
        <text:p text:style-name="Preformatted_20_Text"><text:span text:style-name="Source_20_Text">├── Privé</text:span></text:p>
        <text:p text:style-name="Preformatted_20_Text"><text:span text:style-name="Source_20_Text">│ <text:s text:c="2"/>├── Foto's</text:span></text:p>
        <text:p text:style-name="Preformatted_20_Text"><text:span text:style-name="Source_20_Text">│ <text:s text:c="2"/>└── Documenten</text:span></text:p>
        <text:p text:style-name="Preformatted_20_Text"><text:span text:style-name="Source_20_Text">│</text:span></text:p>
        <text:p text:style-name="P47"><text:span text:style-name="Source_20_Text">└── Oud</text:span></text:p>
      </text:section>
      <text:p text:style-name="Text_20_body">Plaats bestanden in de juiste mappen.</text:p>
      <text:p text:style-name="Text_20_body"/>
      <text:h text:style-name="P14" text:outline-level="3"/>
      <text:h text:style-name="P15" text:outline-level="3">Opdracht 1<text:span text:style-name="T3">7 (optioneel)</text:span></text:h>
      <text:p text:style-name="P48">Maak op het bureaublad een map met naam:</text:p>
      <text:p text:style-name="P48"><text:span text:style-name="Strong_20_Emphasis">Computerles</text:span></text:p>
      <text:p text:style-name="P48">Daarin maak je drie submappen:</text:p>
      <text:list text:style-name="L23">
        <text:list-item>
          <text:p text:style-name="P49">Foto's </text:p>
        </text:list-item>
        <text:list-item>
          <text:p text:style-name="P49">Documenten </text:p>
        </text:list-item>
        <text:list-item>
          <text:p text:style-name="P50">Oud </text:p>
        </text:list-item>
      </text:list>
      <text:p text:style-name="P48">Verplaats daarna:</text:p>
      <text:list text:style-name="L24">
        <text:list-item>
          <text:p text:style-name="P51">één tekstbestand naar <text:span text:style-name="Strong_20_Emphasis">Documenten</text:span> </text:p>
        </text:list-item>
        <text:list-item>
          <text:p text:style-name="P51">twee foto's naar <text:span text:style-name="Strong_20_Emphasis">Foto's</text:span> </text:p>
        </text:list-item>
        <text:list-item>
          <text:p text:style-name="P52">verwijder één bestand en herstel het terug </text:p>
        </text:list-item>
      </text:list>
      <text:p text:style-name="P48">Deze oefening bouwt vrij logisch op, maar voor beginners kan Deel 7 (telefoon verbinden) soms moeilijker zijn dan de rest. Daar kan het handig zijn om vooraf te tonen hoe USB-opties op een telefoon eruitzi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/<loext:page-count-range>9</loext:page-count-rang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31T19:57:59.703089394</meta:creation-date>
    <dc:date>2026-06-01T16:42:59.533212700</dc:date>
    <meta:editing-duration>PT1H22M50S</meta:editing-duration>
    <meta:editing-cycles>8</meta:editing-cycles>
    <meta:generator>LibreOffice/26.2.1.2$Windows_X86_64 LibreOffice_project/620$Build-2</meta:generator>
    <meta:document-statistic meta:table-count="0" meta:image-count="6" meta:object-count="0" meta:page-count="9" meta:paragraph-count="144" meta:word-count="706" meta:character-count="4125" meta:non-whitespace-character-count="3556"/>
  </office:meta>
</office:document-meta>
</file>