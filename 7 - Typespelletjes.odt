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66000001517E2FB3EA.png" manifest:media-type="image/png"/>
  <manifest:file-entry manifest:full-path="Pictures/100000010000026D000000F7E6978E2E.png" manifest:media-type="image/png"/>
  <manifest:file-entry manifest:full-path="Pictures/1000000100000553000003DECAF48E87.png" manifest:media-type="image/png"/>
  <manifest:file-entry manifest:full-path="Pictures/10000001000003A000000328D01F551B.png" manifest:media-type="image/png"/>
  <manifest:file-entry manifest:full-path="Pictures/1000000100000403000002C119BF21E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nl" fo:country="NL" officeooo:rsid="0000d7ae" officeooo:paragraph-rsid="0000d7ae" style:script-type="latin"/>
    </style:style>
    <style:style style:name="P2" style:family="paragraph" style:parent-style-name="Text_20_body">
      <style:text-properties fo:language="nl" fo:country="NL" officeooo:paragraph-rsid="0000d7ae" style:script-type="latin"/>
    </style:style>
    <style:style style:name="P3" style:family="paragraph" style:parent-style-name="Text_20_body">
      <style:text-properties fo:language="nl" fo:country="NL" officeooo:rsid="0001edfb" officeooo:paragraph-rsid="0001edfb" style:script-type="latin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rsid="0001edfb" style:script-type="latin"/>
    </style:style>
    <style:style style:name="P5" style:family="paragraph" style:parent-style-name="Text_20_body">
      <style:text-properties fo:language="nl" fo:country="NL" officeooo:rsid="00025e00" officeooo:paragraph-rsid="00025e00" style:script-type="latin"/>
    </style:style>
    <style:style style:name="P6" style:family="paragraph" style:parent-style-name="Text_20_body">
      <style:text-properties fo:language="nl" fo:country="NL" officeooo:rsid="00025e00" officeooo:paragraph-rsid="00044f8f" style:script-type="latin"/>
    </style:style>
    <style:style style:name="P7" style:family="paragraph" style:parent-style-name="Text_20_body">
      <style:text-properties fo:language="nl" fo:country="NL" officeooo:rsid="0009bc2f" officeooo:paragraph-rsid="0009bc2f" style:script-type="latin"/>
    </style:style>
    <style:style style:name="P8" style:family="paragraph" style:parent-style-name="Text_20_body">
      <style:paragraph-properties fo:break-before="page"/>
      <style:text-properties fo:language="nl" fo:country="NL" officeooo:rsid="0009bc2f" officeooo:paragraph-rsid="0009bc2f" style:script-type="latin"/>
    </style:style>
    <style:style style:name="P9" style:family="paragraph" style:parent-style-name="Text_20_body">
      <style:text-properties fo:language="nl" fo:country="NL" officeooo:rsid="0007bfa5" officeooo:paragraph-rsid="0007bfa5" style:script-type="latin"/>
    </style:style>
    <style:style style:name="P10" style:family="paragraph" style:parent-style-name="Text_20_body">
      <style:text-properties fo:language="nl" fo:country="NL" officeooo:rsid="000d36c5" officeooo:paragraph-rsid="000d36c5" style:script-type="latin"/>
    </style:style>
    <style:style style:name="T1" style:family="text">
      <style:text-properties officeooo:rsid="00025e00"/>
    </style:style>
    <style:style style:name="T2" style:family="text">
      <style:text-properties fo:font-variant="normal" fo:text-transform="none" fo:color="#000080" loext:opacity="100%" style:text-line-through-style="none" style:text-line-through-type="none" fo:font-family="'Google Sans Text'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family="'Google Sans Text'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officeooo:rsid="0023c02b"/>
    </style:style>
    <style:style style:name="T6" style:family="text">
      <style:text-properties officeooo:rsid="00153316"/>
    </style:style>
    <style:style style:name="T7" style:family="text">
      <style:text-properties officeooo:rsid="0024a1c1"/>
    </style:style>
    <style:style style:name="T8" style:family="text">
      <style:text-properties officeooo:rsid="0002a25a"/>
    </style:style>
    <style:style style:name="T9" style:family="text">
      <style:text-properties fo:font-variant="normal" fo:text-transform="none" fo:color="#000000" loext:opacity="100%" style:text-line-through-style="none" style:text-line-through-type="none" fo:font-family="'Google Sans Text'" fo:font-size="11pt" fo:font-style="normal" style:text-underline-style="none" fo:font-weight="normal" officeooo:rsid="0001edfb" style:text-blinking="false" fo:background-color="transparent" loext:char-shading-value="0"/>
    </style:style>
    <style:style style:name="T10" style:family="text">
      <style:text-properties officeooo:rsid="0009bc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efening 7 – Typespelletjes</text:h>
      <text:p text:style-name="P2"/>
      <text:p text:style-name="P3">Hiet zijn sommige webpaginas met typesplletjes. Je kunt ze gebruiken om je typevaardigheden <text:span text:style-name="T1">te verbeteren.</text:span></text:p>
      <text:p text:style-name="P3"><text:a xlink:type="simple" xlink:href="http://www.ratatype.com/nl/typing-test/" text:style-name="Internet_20_link" text:visited-style-name="Visited_20_Internet_20_Link"><text:span text:style-name="T2">www.ratatype.com/nl/typing-test/</text:span></text:a><text:span text:style-name="T3"> </text:span></text:p>
      <text:p text:style-name="P4"><text:a xlink:type="simple" xlink:href="https://agilefingers.com/nl/spellen" text:style-name="Internet_20_link" text:visited-style-name="Visited_20_Internet_20_Link"><text:span text:style-name="T2">agilefingers.com/nl/spellen</text:span></text:a><text:span text:style-name="T3"> </text:span><text:span text:style-name="T4">  </text:span></text:p>
      <text:p text:style-name="P4"><text:a xlink:type="simple" xlink:href="https://kdtype.com/" text:style-name="Internet_20_link" text:visited-style-name="Visited_20_Internet_20_Link"><text:span text:style-name="T2">kdtype.com</text:span></text:a><text:span text:style-name="T3"> </text:span></text:p>
      <text:p text:style-name="P5">Volg deze stappen om een speel te spelen:</text:p>
      <text:p text:style-name="P5">1. Open de webbrowser (Microsoft Edge). </text:p>
      <text:p text:style-name="P5"><draw:frame draw:style-name="fr1" draw:name="Afbeelding1" text:anchor-type="char" svg:x="-0.074cm" svg:y="0.069cm" svg:width="17cm" svg:height="5.29cm" draw:z-index="0"><draw:image xlink:href="Pictures/1000000100000466000001517E2FB3EA.png" xlink:type="simple" xlink:show="embed" xlink:actuate="onLoad" draw:mime-type="image/png"/></draw:frame></text:p>
      <text:p text:style-name="P6">2. <text:span text:style-name="T5">Typ i</text:span><text:span text:style-name="T6">n de adresbalk van </text:span><text:span text:style-name="T5">de</text:span><text:span text:style-name="T6"> </text:span><text:span text:style-name="T7">w</text:span><text:span text:style-name="T6">ebbrowser </text:span><text:span text:style-name="T7">(Microsoft Edge)</text:span><text:span text:style-name="T6"> </text:span><text:span text:style-name="T5">het </text:span><text:span text:style-name="T6">adres van </text:span><text:span text:style-name="T8">het spelletje, Bijvoorbeeld: </text:span><text:span text:style-name="T6"><text:s/>‘</text:span><text:span text:style-name="T9">www.ratatype.com/nl/typing-test/</text:span><text:span text:style-name="T6">’ en druk </text:span><text:span text:style-name="T5">op </text:span><text:span text:style-name="T6">‘Enter’ </text:span><text:span text:style-name="T5">op het</text:span><text:span text:style-name="T6"> toetsenbord.</text:span></text:p>
      <text:p text:style-name="P2"><draw:frame draw:style-name="fr2" draw:name="Afbeelding2" text:anchor-type="char" svg:width="10.954cm" svg:height="4.357cm" draw:z-index="2"><draw:image xlink:href="Pictures/100000010000026D000000F7E6978E2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8"/>
      <text:p text:style-name="P7">3. Als je een cookie melding krijg, klik ‘Toestemming’ of ‘Opties beheren’ → ‘Keuzes bevestigen’</text:p>
      <text:p text:style-name="P9"><draw:frame draw:style-name="fr1" draw:name="Afbeelding4" text:anchor-type="char" svg:x="0.228cm" svg:y="0.261cm" svg:width="16.369cm" svg:height="14.252cm" draw:z-index="3"><draw:image xlink:href="Pictures/10000001000003A000000328D01F551B.png" xlink:type="simple" xlink:show="embed" xlink:actuate="onLoad" draw:mime-type="image/png"/></draw:frame></text:p>
      <text:p text:style-name="P9"><text:span text:style-name="T10">4</text:span>. Als je een melding van Google krijgt, sluit deze dan met de X.</text:p>
      <text:p text:style-name="P9"><draw:frame draw:style-name="fr1" draw:name="Afbeelding3" text:anchor-type="char" svg:x="2.088cm" svg:y="-0.199cm" svg:width="12.792cm" svg:height="8.781cm" draw:z-index="1"><draw:image xlink:href="Pictures/1000000100000403000002C119BF21E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1" draw:name="Afbeelding5" text:anchor-type="char" svg:x="0.074cm" svg:y="1.395cm" svg:width="17cm" svg:height="12.345cm" draw:z-index="4"><draw:image xlink:href="Pictures/1000000100000553000003DECAF48E87.png" xlink:type="simple" xlink:show="embed" xlink:actuate="onLoad" draw:mime-type="image/png"/></draw:frame><text:soft-page-break/>5. Klik op de grote ‘Klik hier om te beginnen’ en test hoe snel je kunt typen.</text:p>
      <text:p text:style-name="P10"/>
      <text:p text:style-name="P10"/>
      <text:p text:style-name="P10">6. Probeer de andere twee spellen, of zoek op internet naar andere spell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2T09:23:39.610782200</meta:creation-date>
    <dc:date>2026-06-22T10:28:56.274383200</dc:date>
    <meta:editing-duration>PT52M4S</meta:editing-duration>
    <meta:editing-cycles>10</meta:editing-cycles>
    <meta:generator>LibreOffice/26.2.1.2$Windows_X86_64 LibreOffice_project/620$Build-2</meta:generator>
    <meta:document-statistic meta:table-count="0" meta:image-count="5" meta:object-count="0" meta:page-count="3" meta:paragraph-count="12" meta:word-count="118" meta:character-count="777" meta:non-whitespace-character-count="663"/>
  </office:meta>
</office:document-meta>
</file>