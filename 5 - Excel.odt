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3.154cm" table:align="left"/>
    </style:style>
    <style:style style:name="Tabel1.A" style:family="table-column">
      <style:table-column-properties style:column-width="1.663cm"/>
    </style:style>
    <style:style style:name="Tabel1.B" style:family="table-column">
      <style:table-column-properties style:column-width="1.49cm"/>
    </style:style>
    <style:style style:name="Tabel1.A1" style:family="table-cell">
      <style:table-cell-properties style:vertical-align="middle" fo:padding="0.049cm" fo:border="none"/>
    </style:style>
    <style:style style:name="Tabel2" style:family="table">
      <style:table-properties style:width="2.799cm" table:align="left"/>
    </style:style>
    <style:style style:name="Tabel2.A" style:family="table-column">
      <style:table-column-properties style:column-width="1.663cm"/>
    </style:style>
    <style:style style:name="Tabel2.B" style:family="table-column">
      <style:table-column-properties style:column-width="1.136cm"/>
    </style:style>
    <style:style style:name="Tabel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7">
      <style:paragraph-properties fo:margin-top="0cm" fo:margin-bottom="0cm" style:contextual-spacing="false"/>
    </style:style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>
      <style:paragraph-properties fo:margin-top="0cm" fo:margin-bottom="0cm" style:contextual-spacing="false"/>
    </style:style>
    <style:style style:name="P34" style:family="paragraph" style:parent-style-name="Text_20_body" style:list-style-name="L19"/>
    <style:style style:name="T1" style:family="text">
      <style:text-properties officeooo:rsid="00025f06"/>
    </style:style>
    <style:style style:name="T2" style:family="text">
      <style:text-properties officeooo:rsid="00035192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efening computerles: Werken met Microsoft Excel</text:h>
      <text:h text:style-name="Heading_20_2" text:outline-level="2">Doel van de oefening</text:h>
      <text:p text:style-name="Text_20_body">Je leert:</text:p>
      <text:list text:style-name="L1">
        <text:list-item>
          <text:p text:style-name="P1">Excel openen </text:p>
        </text:list-item>
        <text:list-item>
          <text:p text:style-name="P1">gegevens van Word naar Excel kopiëren </text:p>
        </text:list-item>
        <text:list-item>
          <text:p text:style-name="P1">werken met tabellen </text:p>
        </text:list-item>
        <text:list-item>
          <text:p text:style-name="P1">kolommen toevoegen </text:p>
        </text:list-item>
        <text:list-item>
          <text:p text:style-name="P1">formules gebruiken </text:p>
        </text:list-item>
        <text:list-item>
          <text:p text:style-name="P1">totalen berekenen </text:p>
        </text:list-item>
        <text:list-item>
          <text:p text:style-name="P2">gegevens sorteren en opmaken </text:p>
        </text:list-item>
      </text:list>
      <text:p text:style-name="Horizontal_20_Line"/>
      <text:h text:style-name="Heading_20_3" text:outline-level="3">Opdracht 1: Excel starten</text:h>
      <text:list text:style-name="L2">
        <text:list-item>
          <text:p text:style-name="P3">Klik op de <text:span text:style-name="Strong_20_Emphasis">Startknop</text:span>. </text:p>
        </text:list-item>
        <text:list-item>
          <text:p text:style-name="P3">Typ: <text:span text:style-name="Strong_20_Emphasis">Excel</text:span>. </text:p>
        </text:list-item>
        <text:list-item>
          <text:p text:style-name="P3">Klik op <text:span text:style-name="Strong_20_Emphasis">Microsoft Excel</text:span>. </text:p>
        </text:list-item>
        <text:list-item>
          <text:p text:style-name="P4">Kies <text:span text:style-name="Strong_20_Emphasis">Lege werkmap</text:span>. </text:p>
        </text:list-item>
      </text:list>
      <text:p text:style-name="Text_20_body"><text:span text:style-name="Strong_20_Emphasis">Controle:</text:span> Zie je vakjes met letters bovenaan en cijfers links?</text:p>
      <text:p text:style-name="Horizontal_20_Line"/>
      <text:h text:style-name="Heading_20_3" text:outline-level="3">Opdracht 2 <text:span text:style-name="T1">(optioneel)</text:span>: Maak deze tabel in Microsoft Word <text:span text:style-name="T1">(of gebruik de tabel van </text:span><text:span text:style-name="T2">de </text:span><text:span text:style-name="T1">vorige les)</text:span></text:h>
      <text:p text:style-name="Text_20_body">Open Word en maak onderstaande tabel:</text:p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Table_20_Heading">Product</text:p>
            </table:table-cell>
            <table:table-cell table:style-name="Tabel1.A1" office:value-type="string">
              <text:p text:style-name="Table_20_Heading">Aantal</text:p>
            </table:table-cell>
          </table:table-row>
        </table:table-header-rows>
        <table:table-row>
          <table:table-cell table:style-name="Tabel1.A1" office:value-type="string">
            <text:p text:style-name="Table_20_Contents">Brood</text:p>
          </table:table-cell>
          <table:table-cell table:style-name="Tabel1.A1" office:value-type="string">
            <text:p text:style-name="Table_20_Contents">5</text:p>
          </table:table-cell>
        </table:table-row>
        <table:table-row>
          <table:table-cell table:style-name="Tabel1.A1" office:value-type="string">
            <text:p text:style-name="Table_20_Contents">Melk</text:p>
          </table:table-cell>
          <table:table-cell table:style-name="Tabel1.A1" office:value-type="string">
            <text:p text:style-name="Table_20_Contents">3</text:p>
          </table:table-cell>
        </table:table-row>
        <table:table-row>
          <table:table-cell table:style-name="Tabel1.A1" office:value-type="string">
            <text:p text:style-name="Table_20_Contents">Appels</text:p>
          </table:table-cell>
          <table:table-cell table:style-name="Tabel1.A1" office:value-type="string">
            <text:p text:style-name="Table_20_Contents">8</text:p>
          </table:table-cell>
        </table:table-row>
        <table:table-row>
          <table:table-cell table:style-name="Tabel1.A1" office:value-type="string">
            <text:p text:style-name="Table_20_Contents">Kaas</text:p>
          </table:table-cell>
          <table:table-cell table:style-name="Tabel1.A1" office:value-type="string">
            <text:p text:style-name="Table_20_Contents">2</text:p>
          </table:table-cell>
        </table:table-row>
        <table:table-row>
          <table:table-cell table:style-name="Tabel1.A1" office:value-type="string">
            <text:p text:style-name="Table_20_Contents">Pasta</text:p>
          </table:table-cell>
          <table:table-cell table:style-name="Tabel1.A1" office:value-type="string">
            <text:p text:style-name="Table_20_Contents">4</text:p>
          </table:table-cell>
        </table:table-row>
      </table:table>
      <text:list text:style-name="L3">
        <text:list-item>
          <text:p text:style-name="P5">Open <text:span text:style-name="Strong_20_Emphasis">Microsoft Word</text:span>. </text:p>
        </text:list-item>
        <text:list-item>
          <text:p text:style-name="P5">Maak de tabel. </text:p>
        </text:list-item>
        <text:list-item>
          <text:p text:style-name="P6">Sla het document op als: </text:p>
        </text:list-item>
      </text:list>
      <text:p text:style-name="Text_20_body"><text:span text:style-name="Source_20_Text">boodschappenlijst.docx</text:span></text:p>
      <text:p text:style-name="Horizontal_20_Line"/>
      <text:h text:style-name="Heading_20_3" text:outline-level="3">Opdracht 3: Kopieer de tabel van Word naar Excel</text:h>
      <text:list text:style-name="L4">
        <text:list-item>
          <text:p text:style-name="P7">Selecteer de volledige tabel in Word. </text:p>
        </text:list-item>
        <text:list-item>
          <text:p text:style-name="P7"><text:soft-page-break/>Druk <text:span text:style-name="Strong_20_Emphasis">Ctrl + C</text:span>. </text:p>
        </text:list-item>
        <text:list-item>
          <text:p text:style-name="P7">Open Excel. </text:p>
        </text:list-item>
        <text:list-item>
          <text:p text:style-name="P7">Klik op cel <text:span text:style-name="Strong_20_Emphasis">A1</text:span>. </text:p>
        </text:list-item>
        <text:list-item>
          <text:p text:style-name="P8">Druk <text:span text:style-name="Strong_20_Emphasis">Ctrl + V</text:span>. </text:p>
        </text:list-item>
      </text:list>
      <text:p text:style-name="Text_20_body"><text:span text:style-name="Strong_20_Emphasis">Controle:</text:span> Staat ieder onderdeel in een aparte cel?</text:p>
      <text:p text:style-name="Horizontal_20_Line"/>
      <text:h text:style-name="Heading_20_3" text:outline-level="3">Opdracht 4: Voeg kolom "Prijs" toe</text:h>
      <text:list text:style-name="L5">
        <text:list-item>
          <text:p text:style-name="P9">Klik op kolom <text:span text:style-name="Strong_20_Emphasis">C</text:span>. </text:p>
        </text:list-item>
        <text:list-item>
          <text:p text:style-name="P10">Typ in cel <text:span text:style-name="Strong_20_Emphasis">C1</text:span>: </text:p>
        </text:list-item>
      </text:list>
      <text:p text:style-name="Text_20_body"><text:span text:style-name="Source_20_Text">Prijs</text:span></text:p>
      <text:list text:style-name="L6">
        <text:list-item>
          <text:p text:style-name="P11">Vul prijzen in: </text:p>
        </text:list-item>
      </text:list>
      <table:table table:name="Tabel2" table:style-name="Tabel2">
        <table:table-column table:style-name="Tabel2.A"/>
        <table:table-column table:style-name="Tabel2.B"/>
        <table:table-header-rows>
          <table:table-row>
            <table:table-cell table:style-name="Tabel2.A1" office:value-type="string">
              <text:p text:style-name="Table_20_Heading">Product</text:p>
            </table:table-cell>
            <table:table-cell table:style-name="Tabel2.A1" office:value-type="string">
              <text:p text:style-name="Table_20_Heading">Prijs</text:p>
            </table:table-cell>
          </table:table-row>
        </table:table-header-rows>
        <table:table-row>
          <table:table-cell table:style-name="Tabel2.A1" office:value-type="string">
            <text:p text:style-name="Table_20_Contents">Brood</text:p>
          </table:table-cell>
          <table:table-cell table:style-name="Tabel2.A1" office:value-type="string">
            <text:p text:style-name="Table_20_Contents">2,00</text:p>
          </table:table-cell>
        </table:table-row>
        <table:table-row>
          <table:table-cell table:style-name="Tabel2.A1" office:value-type="string">
            <text:p text:style-name="Table_20_Contents">Melk</text:p>
          </table:table-cell>
          <table:table-cell table:style-name="Tabel2.A1" office:value-type="string">
            <text:p text:style-name="Table_20_Contents">1,50</text:p>
          </table:table-cell>
        </table:table-row>
        <table:table-row>
          <table:table-cell table:style-name="Tabel2.A1" office:value-type="string">
            <text:p text:style-name="Table_20_Contents">Appels</text:p>
          </table:table-cell>
          <table:table-cell table:style-name="Tabel2.A1" office:value-type="string">
            <text:p text:style-name="Table_20_Contents">0,40</text:p>
          </table:table-cell>
        </table:table-row>
        <table:table-row>
          <table:table-cell table:style-name="Tabel2.A1" office:value-type="string">
            <text:p text:style-name="Table_20_Contents">Kaas</text:p>
          </table:table-cell>
          <table:table-cell table:style-name="Tabel2.A1" office:value-type="string">
            <text:p text:style-name="Table_20_Contents">4,00</text:p>
          </table:table-cell>
        </table:table-row>
        <table:table-row>
          <table:table-cell table:style-name="Tabel2.A1" office:value-type="string">
            <text:p text:style-name="Table_20_Contents">Pasta</text:p>
          </table:table-cell>
          <table:table-cell table:style-name="Tabel2.A1" office:value-type="string">
            <text:p text:style-name="Table_20_Contents">1,20</text:p>
          </table:table-cell>
        </table:table-row>
      </table:table>
      <text:p text:style-name="Horizontal_20_Line"/>
      <text:h text:style-name="Heading_20_3" text:outline-level="3">Opdracht 5: Voeg kolom "Totaal" toe</text:h>
      <text:list text:style-name="L7">
        <text:list-item>
          <text:p text:style-name="P12">Typ in <text:span text:style-name="Strong_20_Emphasis">D1</text:span>: </text:p>
        </text:list-item>
      </text:list>
      <text:p text:style-name="Text_20_body"><text:span text:style-name="Source_20_Text">Totaal</text:span></text:p>
      <text:list text:style-name="L8">
        <text:list-item>
          <text:p text:style-name="P13">Klik in cel <text:span text:style-name="Strong_20_Emphasis">D2</text:span>. </text:p>
        </text:list-item>
        <text:list-item>
          <text:p text:style-name="P14">Typ: </text:p>
        </text:list-item>
      </text:list>
      <text:section text:style-name="Sect1" text:name="code-block-viewer">
        <text:p text:style-name="P15"><text:span text:style-name="Source_20_Text">=B2*C2</text:span></text:p>
      </text:section>
      <text:list text:style-name="L9">
        <text:list-item>
          <text:p text:style-name="P16">Druk op <text:span text:style-name="Strong_20_Emphasis">Enter</text:span>. </text:p>
        </text:list-item>
        <text:list-item>
          <text:p text:style-name="P17">Sleep het kleine vierkantje rechtsonder in de cel naar beneden. </text:p>
        </text:list-item>
      </text:list>
      <text:p text:style-name="Text_20_body"><text:span text:style-name="Strong_20_Emphasis">Vraag:</text:span> Zijn alle totalen automatisch ingevuld?</text:p>
      <text:p text:style-name="Horizontal_20_Line"/>
      <text:h text:style-name="Heading_20_3" text:outline-level="3">Opdracht 6: Bereken het eindtotaal</text:h>
      <text:list text:style-name="L10">
        <text:list-item>
          <text:p text:style-name="P18">Klik onder de laatste waarde in kolom D. </text:p>
        </text:list-item>
        <text:list-item>
          <text:p text:style-name="P19">Typ: </text:p>
        </text:list-item>
      </text:list>
      <text:section text:style-name="Sect1" text:name="Sectie1">
        <text:p text:style-name="P15"><text:bookmark text:name="code-block-viewer"/><text:span text:style-name="Source_20_Text">=SOM(D2:D6)</text:span></text:p>
      </text:section>
      <text:list text:style-name="L11">
        <text:list-item>
          <text:p text:style-name="P20">Druk op <text:span text:style-name="Strong_20_Emphasis">Enter</text:span>. </text:p>
        </text:list-item>
      </text:list>
      <text:p text:style-name="Text_20_body"><text:span text:style-name="Strong_20_Emphasis">Vraag:</text:span> Wat is het totale bedrag?</text:p>
      <text:p text:style-name="Horizontal_20_Line"/>
      <text:h text:style-name="Heading_20_3" text:outline-level="3"><text:soft-page-break/>Opdracht 7: Maak bedragen duidelijker</text:h>
      <text:list text:style-name="L12">
        <text:list-item>
          <text:p text:style-name="P21">Selecteer kolommen <text:span text:style-name="Strong_20_Emphasis">C</text:span> en <text:span text:style-name="Strong_20_Emphasis">D</text:span>. </text:p>
        </text:list-item>
        <text:list-item>
          <text:p text:style-name="P21">Klik bovenaan op <text:span text:style-name="Strong_20_Emphasis">Start</text:span>. </text:p>
        </text:list-item>
        <text:list-item>
          <text:p text:style-name="P21">Zoek het symbool <text:span text:style-name="Strong_20_Emphasis">€</text:span>. </text:p>
        </text:list-item>
        <text:list-item>
          <text:p text:style-name="P22">Kies <text:span text:style-name="Strong_20_Emphasis">Valuta / Euro</text:span>. </text:p>
        </text:list-item>
      </text:list>
      <text:p text:style-name="Text_20_body"><text:span text:style-name="Strong_20_Emphasis">Controle:</text:span> Hebben alle prijzen nu een euroteken?</text:p>
      <text:p text:style-name="Horizontal_20_Line"/>
      <text:h text:style-name="Heading_20_3" text:outline-level="3">Opdracht 8: Sorteer producten</text:h>
      <text:list text:style-name="L13">
        <text:list-item>
          <text:p text:style-name="P23">Selecteer de hele tabel. </text:p>
        </text:list-item>
        <text:list-item>
          <text:p text:style-name="P23">Klik op <text:span text:style-name="Strong_20_Emphasis">Gegevens</text:span>. </text:p>
        </text:list-item>
        <text:list-item>
          <text:p text:style-name="P24">Kies <text:span text:style-name="Strong_20_Emphasis">Sorteren van A naar Z</text:span>. </text:p>
        </text:list-item>
      </text:list>
      <text:p text:style-name="Text_20_body"><text:span text:style-name="Strong_20_Emphasis">Vraag:</text:span> Welke producten staan nu bovenaan?</text:p>
      <text:p text:style-name="Horizontal_20_Line"/>
      <text:h text:style-name="Heading_20_3" text:outline-level="3">Opdracht 9: Bereken gemiddelde prijs</text:h>
      <text:list text:style-name="L14">
        <text:list-item>
          <text:p text:style-name="P25">Klik onder de prijskolom. </text:p>
        </text:list-item>
        <text:list-item>
          <text:p text:style-name="P26">Typ: </text:p>
        </text:list-item>
      </text:list>
      <text:section text:style-name="Sect1" text:name="Sectie2">
        <text:p text:style-name="P15"><text:bookmark text:name="code-block-viewer Kopiëren 1"/><text:span text:style-name="Source_20_Text">=GEMIDDELDE(C2:C6)</text:span></text:p>
      </text:section>
      <text:list text:style-name="L15">
        <text:list-item>
          <text:p text:style-name="P27">Druk op <text:span text:style-name="Strong_20_Emphasis">Enter</text:span>. </text:p>
        </text:list-item>
      </text:list>
      <text:p text:style-name="Text_20_body"><text:span text:style-name="Strong_20_Emphasis">Vraag:</text:span> Wat is de gemiddelde prijs?</text:p>
      <text:p text:style-name="Horizontal_20_Line"/>
      <text:h text:style-name="Heading_20_3" text:outline-level="3">Opdracht 10: Maak een eenvoudige grafiek</text:h>
      <text:list text:style-name="L16">
        <text:list-item>
          <text:p text:style-name="P28">Selecteer kolommen <text:span text:style-name="Strong_20_Emphasis">Product</text:span> en <text:span text:style-name="Strong_20_Emphasis">Aantal</text:span>. </text:p>
        </text:list-item>
        <text:list-item>
          <text:p text:style-name="P28">Klik op <text:span text:style-name="Strong_20_Emphasis">Invoegen</text:span>. </text:p>
        </text:list-item>
        <text:list-item>
          <text:p text:style-name="P29">Kies <text:span text:style-name="Strong_20_Emphasis">Kolomdiagram</text:span>. </text:p>
        </text:list-item>
      </text:list>
      <text:p text:style-name="Text_20_body"><text:span text:style-name="Strong_20_Emphasis">Controle:</text:span> Zie je een grafiek met producten en aantallen?</text:p>
      <text:p text:style-name="Horizontal_20_Line"/>
      <text:h text:style-name="Heading_20_3" text:outline-level="3">Opdracht 11: Werkmap opslaan</text:h>
      <text:list text:style-name="L17">
        <text:list-item>
          <text:p text:style-name="P30">Klik op <text:span text:style-name="Strong_20_Emphasis">Bestand → Opslaan als</text:span>. </text:p>
        </text:list-item>
        <text:list-item>
          <text:p text:style-name="P30">Kies <text:span text:style-name="Strong_20_Emphasis">Documenten</text:span>. </text:p>
        </text:list-item>
        <text:list-item>
          <text:p text:style-name="P31">Geef naam: </text:p>
        </text:list-item>
      </text:list>
      <text:p text:style-name="Text_20_body"><text:span text:style-name="Source_20_Text">Boodschappenoverzicht.xlsx</text:span></text:p>
      <text:list text:style-name="L18">
        <text:list-item>
          <text:p text:style-name="P32">Klik op <text:span text:style-name="Strong_20_Emphasis">Opslaan</text:span>. </text:p>
        </text:list-item>
      </text:list>
      <text:p text:style-name="Horizontal_20_Line"/>
      <text:h text:style-name="Heading_20_1" text:outline-level="1"><text:soft-page-break/>Extra uitdaging</text:h>
      <text:p text:style-name="Text_20_body">Maak nog 3 nieuwe producten en voeg zelf:</text:p>
      <text:list text:style-name="L19">
        <text:list-item>
          <text:p text:style-name="P33">aantallen toe </text:p>
        </text:list-item>
        <text:list-item>
          <text:p text:style-name="P33">prijzen toe </text:p>
        </text:list-item>
        <text:list-item>
          <text:p text:style-name="P33">formules toe </text:p>
        </text:list-item>
        <text:list-item>
          <text:p text:style-name="P34">controleer of het totaal automatisch verandert </text:p>
        </text:list-item>
      </text:list>
      <text:p text:style-name="Text_20_body">Deze extra onderdelen (valuta-opmaak, sorteren, grafieken en gemiddelde) zijn nuttig omdat mensen Excel vaak niet alleen gebruiken voor invoer, maar ook voor overzicht en eenvoudige berekening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1:07:00.657067655</meta:creation-date>
    <dc:date>2026-06-01T12:32:17.050231100</dc:date>
    <meta:editing-duration>PT6M31S</meta:editing-duration>
    <meta:editing-cycles>3</meta:editing-cycles>
    <meta:generator>LibreOffice/26.2.1.2$Windows_X86_64 LibreOffice_project/620$Build-2</meta:generator>
    <meta:document-statistic meta:table-count="2" meta:image-count="0" meta:object-count="0" meta:page-count="4" meta:paragraph-count="108" meta:word-count="447" meta:character-count="2515" meta:non-whitespace-character-count="2176"/>
  </office:meta>
</office:document-meta>
</file>